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number="urn:oasis:names:tc:opendocument:xmlns:datastyle:1.0" xmlns:of="urn:oasis:names:tc:opendocument:xmlns:of:1.2" office:version="1.2">
  <office:scripts/>
  <office:automatic-styles>
    <style:style style:name="Co1" style:family="table-column">
      <style:table-column-properties style:column-width="1.15cm"/>
    </style:style>
    <style:style style:name="Co2" style:family="table-column">
      <style:table-column-properties style:column-width="2.2cm"/>
    </style:style>
    <style:style style:name="Co3" style:family="table-column">
      <style:table-column-properties style:column-width="2.4cm"/>
    </style:style>
    <style:style style:name="Co4" style:family="table-column">
      <style:table-column-properties style:column-width="3.4cm"/>
    </style:style>
    <style:style style:name="Co5" style:family="table-column">
      <style:table-column-properties style:column-width="2.2cm"/>
    </style:style>
    <style:style style:name="Co6" style:family="table-column">
      <style:table-column-properties style:column-width="2.2cm"/>
    </style:style>
    <style:style style:name="Co7" style:family="table-column">
      <style:table-column-properties style:column-width="2.4cm"/>
    </style:style>
    <style:style style:name="Co8" style:family="table-column">
      <style:table-column-properties style:column-width="2.6cm"/>
    </style:style>
    <style:style style:name="Co9" style:family="table-column">
      <style:table-column-properties style:column-width="2.6cm"/>
    </style:style>
    <style:style style:name="Co10" style:family="table-column">
      <style:table-column-properties style:column-width="3.1cm"/>
    </style:style>
    <style:style style:name="Co11" style:family="table-column">
      <style:table-column-properties style:column-width="3.0cm"/>
    </style:style>
    <style:style style:name="Co12" style:family="table-column">
      <style:table-column-properties style:column-width="3.1cm"/>
    </style:style>
    <style:style style:name="Co13" style:family="table-column">
      <style:table-column-properties style:column-width="3.0cm"/>
    </style:style>
    <number:number-style style:name="NNumber">
      <number:number number:min-integer-digits="1" number:decimal-places="0"/>
    </number:number-style>
    <number:number-style style:name="NAmount">
      <number:number number:min-integer-digits="1" number:decimal-places="0" number:grouping="true"/>
    </number:number-style>
    <number:percentage-style style:name="NPercent">
      <number:number number:min-integer-digits="1" number:decimal-places="2"/>
      <number:text>%</number:text>
    </number:percentage-style>
    <number:date-style style:name="NDate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RowDefault" style:family="table-row">
      <style:table-row-properties style:row-height="0.72cm"/>
    </style:style>
    <style:style style:name="RowTitle" style:family="table-row">
      <style:table-row-properties style:row-height="0.95cm"/>
    </style:style>
    <style:style style:name="RowHeader" style:family="table-row">
      <style:table-row-properties style:row-height="0.82cm"/>
    </style:style>
    <style:style style:name="RowSummary" style:family="table-row">
      <style:table-row-properties style:row-height="0.75cm"/>
    </style:style>
    <style:style style:name="PTitle" style:family="paragraph">
      <style:paragraph-properties fo:text-align="center"/>
      <style:text-properties fo:font-family="DFKai-SB, BiauKai, Noto Serif CJK TC, Noto Sans CJK TC, serif" fo:font-size="15pt" fo:font-weight="bold"/>
    </style:style>
    <style:style style:name="PHeader" style:family="paragraph">
      <style:paragraph-properties fo:text-align="center"/>
      <style:text-properties fo:font-family="DFKai-SB, BiauKai, Noto Serif CJK TC, Noto Sans CJK TC, serif" fo:font-size="11pt" fo:font-weight="bold"/>
    </style:style>
    <style:style style:name="PLabel" style:family="paragraph">
      <style:text-properties fo:font-family="DFKai-SB, BiauKai, Noto Serif CJK TC, Noto Sans CJK TC, serif" fo:font-size="12pt" fo:font-weight="bold"/>
    </style:style>
    <style:style style:name="PBody" style:family="paragraph">
      <style:text-properties fo:font-family="DFKai-SB, BiauKai, Noto Serif CJK TC, Noto Sans CJK TC, serif" fo:font-size="11pt"/>
    </style:style>
    <style:style style:name="PSmall" style:family="paragraph">
      <style:text-properties fo:font-family="DFKai-SB, BiauKai, Noto Serif CJK TC, Noto Sans CJK TC, serif" fo:font-size="9pt"/>
    </style:style>
    <style:style style:name="CellTitle" style:family="table-cell">
      <style:table-cell-properties fo:border="0.03cm solid #4b5563" fo:padding="0.16cm" fo:background-color="#f8fafc"/>
    </style:style>
    <style:style style:name="CellLabel" style:family="table-cell">
      <style:table-cell-properties fo:border="0.03cm solid #6b7280" fo:padding="0.12cm" fo:background-color="#eef2ff"/>
    </style:style>
    <style:style style:name="CellValue" style:family="table-cell">
      <style:table-cell-properties fo:border="0.03cm solid #9ca3af" fo:padding="0.12cm"/>
    </style:style>
    <style:style style:name="CellDate" style:family="table-cell" style:data-style-name="NDate">
      <style:table-cell-properties fo:border="0.03cm solid #9ca3af" fo:padding="0.12cm"/>
    </style:style>
    <style:style style:name="CellHeader" style:family="table-cell">
      <style:table-cell-properties fo:border="0.03cm solid #374151" fo:padding="0.1cm" fo:background-color="#dbeafe"/>
    </style:style>
    <style:style style:name="CellBody" style:family="table-cell">
      <style:table-cell-properties fo:border="0.03cm solid #cbd5e1" fo:padding="0.09cm"/>
    </style:style>
    <style:style style:name="CellNumber" style:family="table-cell" style:data-style-name="NNumber">
      <style:table-cell-properties fo:border="0.03cm solid #cbd5e1" fo:padding="0.09cm"/>
    </style:style>
    <style:style style:name="CellMoney" style:family="table-cell" style:data-style-name="NAmount">
      <style:table-cell-properties fo:border="0.03cm solid #cbd5e1" fo:padding="0.09cm"/>
    </style:style>
    <style:style style:name="CellMoneyFormula" style:family="table-cell" style:data-style-name="NAmount">
      <style:table-cell-properties fo:border="0.03cm solid #94a3b8" fo:padding="0.09cm" fo:background-color="#f8fafc"/>
    </style:style>
    <style:style style:name="CellSummaryHeader" style:family="table-cell">
      <style:table-cell-properties fo:border="0.03cm solid #4b5563" fo:padding="0.1cm" fo:background-color="#e5e7eb"/>
    </style:style>
    <style:style style:name="CellSummaryText" style:family="table-cell">
      <style:table-cell-properties fo:border="0.03cm solid #cbd5e1" fo:padding="0.09cm"/>
    </style:style>
    <style:style style:name="CellSummaryMoney" style:family="table-cell" style:data-style-name="NAmount">
      <style:table-cell-properties fo:border="0.03cm solid #cbd5e1" fo:padding="0.09cm"/>
    </style:style>
    <style:style style:name="CellSummaryFormula" style:family="table-cell" style:data-style-name="NAmount">
      <style:table-cell-properties fo:border="0.03cm solid #cbd5e1" fo:padding="0.09cm" fo:background-color="#f8fafc"/>
    </style:style>
    <style:style style:name="CellSummaryPercent" style:family="table-cell" style:data-style-name="NPercent">
      <style:table-cell-properties fo:border="0.03cm solid #cbd5e1" fo:padding="0.09cm" fo:background-color="#f8fafc"/>
    </style:style>
    <style:style style:name="CellBlank" style:family="table-cell">
      <style:table-cell-properties fo:border="none" fo:padding="0.08cm"/>
    </style:style>
  </office:automatic-styles>
  <office:body>
    <office:spreadsheet>
      <table:content-validations>
        <table:content-validation table:name="validation_category" table:allow-empty-cell="true" table:display-list="unsorted" table:condition="of:cell-content-is-in-list(&quot;結餘&quot;;&quot;補助收入&quot;;&quot;餐食費&quot;;&quot;交通費&quot;;&quot;保險費&quot;;&quot;印刷費&quot;;&quot;道具費&quot;;&quot;活動費&quot;;&quot;活動支出&quot;;&quot;器材費&quot;;&quot;場地費&quot;;&quot;講師費&quot;;&quot;文具費&quot;;&quot;社費&quot;;&quot;學校補助&quot;;&quot;校外補助&quot;;&quot;合作單位補助&quot;;&quot;活動收入&quot;;&quot;利息&quot;;&quot;其他收入&quot;;&quot;其他支出&quot;)">
          <table:error-message table:display="true" table:message-type="stop">
            <text:p text:style-name="PSmall">請從類別清單選擇項目。</text:p>
          </table:error-message>
        </table:content-validation>
        <table:content-validation table:name="validation_paid_status" table:allow-empty-cell="true" table:display-list="unsorted" table:condition="of:cell-content-is-in-list(&quot;是&quot;;&quot;否&quot;;&quot;不適用&quot;)">
          <table:error-message table:display="true" table:message-type="stop">
            <text:p text:style-name="PSmall">請從撥款狀態清單選擇。</text:p>
          </table:error-message>
        </table:content-validation>
        <table:content-validation table:name="validation_settlement_status" table:allow-empty-cell="true" table:display-list="unsorted" table:condition="of:cell-content-is-in-list(&quot;是&quot;;&quot;否&quot;;&quot;不適用&quot;)">
          <table:error-message table:display="true" table:message-type="stop">
            <text:p text:style-name="PSmall">請從活動結算狀態清單選擇。</text:p>
          </table:error-message>
        </table:content-validation>
      </table:content-validations>
      <table:table table:name="收支明細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13"/>
        <table:table-row table:style-name="RowTitle">
          <table:table-cell table:style-name="CellTitle" office:value-type="string" table:number-columns-spanned="13">
            <text:p text:style-name="PTitle">臺北市立大學 社團經費收支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Default">
          <table:table-cell table:style-name="CellLabel" office:value-type="string">
            <text:p text:style-name="PLabel">學年度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學期</text:p>
          </table:table-cell>
          <table:table-cell table:style-name="CellValue" office:value-type="string">
            <text:p text:style-name="PBody"/>
          </table:table-cell>
          <table:table-cell table:style-name="CellLabel" office:value-type="string">
            <text:p text:style-name="PLabel">社團名稱</text:p>
          </table:table-cell>
          <table:table-cell table:style-name="CellValue" office:value-type="string" table:number-columns-spanned="8">
            <text:p text:style-name="P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Label" office:value-type="string">
            <text:p text:style-name="PLabel">記帳期間</text:p>
          </table:table-cell>
          <table:table-cell table:style-name="CellValue" office:value-type="string" table:number-columns-spanned="3">
            <text:p text:style-name="PBody"/>
          </table:table-cell>
          <table:covered-table-cell/>
          <table:covered-table-cell/>
          <table:table-cell table:style-name="CellLabel" office:value-type="string">
            <text:p text:style-name="PLabel">財務負責人</text:p>
          </table:table-cell>
          <table:table-cell table:style-name="CellValue" office:value-type="string" table:number-columns-spanned="3">
            <text:p text:style-name="PBody"/>
          </table:table-cell>
          <table:covered-table-cell/>
          <table:covered-table-cell/>
          <table:table-cell table:style-name="CellLabel" office:value-type="string">
            <text:p text:style-name="PLabel">製表日期</text:p>
          </table:table-cell>
          <table:table-cell table:style-name="CellValue" office:value-type="string" table:number-columns-spanned="4">
            <text:p text:style-name="PBody"/>
          </table:table-cell>
          <table:covered-table-cell/>
          <table:covered-table-cell/>
          <table:covered-table-cell/>
        </table:table-row>
        <table:table-row table:style-name="RowDefault">
          <table:table-cell table:style-name="CellLabel" office:value-type="string">
            <text:p text:style-name="PLabel">期初餘額</text:p>
          </table:table-cell>
          <table:table-cell table:style-name="CellMoney" office:value-type="float" office:value="0">
            <text:p text:style-name="PBody"/>
          </table:table-cell>
          <table:table-cell table:style-name="CellLabel" office:value-type="string">
            <text:p text:style-name="PLabel">備註</text:p>
          </table:table-cell>
          <table:table-cell table:style-name="CellValue" office:value-type="string" table:number-columns-spanned="10">
            <text:p text:style-name="P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Default"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  <table:table-cell table:style-name="CellBlank" office:value-type="string">
            <text:p text:style-name="PBody"/>
          </table:table-cell>
        </table:table-row>
        <table:table-row table:style-name="RowHeader">
          <table:table-cell table:style-name="CellHeader" office:value-type="string">
            <text:p text:style-name="PHeader">序號</text:p>
          </table:table-cell>
          <table:table-cell table:style-name="CellHeader" office:value-type="string">
            <text:p text:style-name="PHeader">日期</text:p>
          </table:table-cell>
          <table:table-cell table:style-name="CellHeader" office:value-type="string">
            <text:p text:style-name="PHeader">類別</text:p>
          </table:table-cell>
          <table:table-cell table:style-name="CellHeader" office:value-type="string">
            <text:p text:style-name="PHeader">品項</text:p>
          </table:table-cell>
          <table:table-cell table:style-name="CellHeader" office:value-type="string">
            <text:p text:style-name="PHeader">支出</text:p>
          </table:table-cell>
          <table:table-cell table:style-name="CellHeader" office:value-type="string">
            <text:p text:style-name="PHeader">收入</text:p>
          </table:table-cell>
          <table:table-cell table:style-name="CellHeader" office:value-type="string">
            <text:p text:style-name="PHeader">餘額</text:p>
          </table:table-cell>
          <table:table-cell table:style-name="CellHeader" office:value-type="string">
            <text:p text:style-name="PHeader">代墊人</text:p>
          </table:table-cell>
          <table:table-cell table:style-name="CellHeader" office:value-type="string">
            <text:p text:style-name="PHeader">是否已撥款</text:p>
          </table:table-cell>
          <table:table-cell table:style-name="CellHeader" office:value-type="string">
            <text:p text:style-name="PHeader">是否已列入活動結算</text:p>
          </table:table-cell>
          <table:table-cell table:style-name="CellHeader" office:value-type="string">
            <text:p text:style-name="PHeader">對應活動</text:p>
          </table:table-cell>
          <table:table-cell table:style-name="CellHeader" office:value-type="string">
            <text:p text:style-name="PHeader">憑證／明細表</text:p>
          </table:table-cell>
          <table:table-cell table:style-name="CellHeader" office:value-type="string">
            <text:p text:style-name="PHeader">備註</text:p>
          </table:table-cell>
        </table:table-row>
        <table:table-row table:style-name="RowDefault">
          <table:table-cell table:style-name="CellBody" office:value-type="float" office:value="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$B$5]+N([.F8])-N([.E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]+N([.F9])-N([.E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]+N([.F10])-N([.E1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]+N([.F11])-N([.E1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]+N([.F12])-N([.E1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]+N([.F13])-N([.E1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]+N([.F14])-N([.E1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]+N([.F15])-N([.E1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]+N([.F16])-N([.E1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]+N([.F17])-N([.E1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]+N([.F18])-N([.E1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]+N([.F19])-N([.E1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]+N([.F20])-N([.E2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0]+N([.F21])-N([.E2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1]+N([.F22])-N([.E2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2]+N([.F23])-N([.E2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3]+N([.F24])-N([.E2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4]+N([.F25])-N([.E2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5]+N([.F26])-N([.E2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6]+N([.F27])-N([.E2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7]+N([.F28])-N([.E2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8]+N([.F29])-N([.E2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9]+N([.F30])-N([.E3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0]+N([.F31])-N([.E3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1]+N([.F32])-N([.E3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2]+N([.F33])-N([.E3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3]+N([.F34])-N([.E3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4]+N([.F35])-N([.E3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5]+N([.F36])-N([.E3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6]+N([.F37])-N([.E3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7]+N([.F38])-N([.E3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8]+N([.F39])-N([.E3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39]+N([.F40])-N([.E4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0]+N([.F41])-N([.E4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1]+N([.F42])-N([.E4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2]+N([.F43])-N([.E4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3]+N([.F44])-N([.E4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4]+N([.F45])-N([.E4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3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5]+N([.F46])-N([.E4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6]+N([.F47])-N([.E4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7]+N([.F48])-N([.E4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8]+N([.F49])-N([.E4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49]+N([.F50])-N([.E5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0]+N([.F51])-N([.E5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1]+N([.F52])-N([.E5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2]+N([.F53])-N([.E5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3]+N([.F54])-N([.E5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4]+N([.F55])-N([.E5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4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5]+N([.F56])-N([.E5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6]+N([.F57])-N([.E5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7]+N([.F58])-N([.E5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8]+N([.F59])-N([.E5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59]+N([.F60])-N([.E6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0]+N([.F61])-N([.E6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1]+N([.F62])-N([.E6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2]+N([.F63])-N([.E6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3]+N([.F64])-N([.E6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4]+N([.F65])-N([.E6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5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5]+N([.F66])-N([.E6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6]+N([.F67])-N([.E6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7]+N([.F68])-N([.E6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8]+N([.F69])-N([.E6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69]+N([.F70])-N([.E7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0]+N([.F71])-N([.E7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1]+N([.F72])-N([.E7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2]+N([.F73])-N([.E7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3]+N([.F74])-N([.E7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4]+N([.F75])-N([.E7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6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5]+N([.F76])-N([.E7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6]+N([.F77])-N([.E7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7]+N([.F78])-N([.E7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8]+N([.F79])-N([.E7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79]+N([.F80])-N([.E8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0]+N([.F81])-N([.E8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1]+N([.F82])-N([.E8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2]+N([.F83])-N([.E8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3]+N([.F84])-N([.E8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4]+N([.F85])-N([.E8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7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5]+N([.F86])-N([.E8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6]+N([.F87])-N([.E8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7]+N([.F88])-N([.E8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8]+N([.F89])-N([.E8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89]+N([.F90])-N([.E9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0]+N([.F91])-N([.E9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1]+N([.F92])-N([.E9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2]+N([.F93])-N([.E9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3]+N([.F94])-N([.E9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4]+N([.F95])-N([.E9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8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5]+N([.F96])-N([.E9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6]+N([.F97])-N([.E9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7]+N([.F98])-N([.E9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8]+N([.F99])-N([.E9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99]+N([.F100])-N([.E10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0]+N([.F101])-N([.E10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1]+N([.F102])-N([.E10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2]+N([.F103])-N([.E10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3]+N([.F104])-N([.E10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4]+N([.F105])-N([.E10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9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5]+N([.F106])-N([.E10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6]+N([.F107])-N([.E10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7]+N([.F108])-N([.E10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8]+N([.F109])-N([.E10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09]+N([.F110])-N([.E11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0]+N([.F111])-N([.E11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1]+N([.F112])-N([.E11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2]+N([.F113])-N([.E11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3]+N([.F114])-N([.E11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4]+N([.F115])-N([.E11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0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5]+N([.F116])-N([.E11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6]+N([.F117])-N([.E11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7]+N([.F118])-N([.E11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8]+N([.F119])-N([.E11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19]+N([.F120])-N([.E12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0]+N([.F121])-N([.E12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1]+N([.F122])-N([.E12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2]+N([.F123])-N([.E12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3]+N([.F124])-N([.E12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4]+N([.F125])-N([.E12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1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5]+N([.F126])-N([.E12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6]+N([.F127])-N([.E12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7]+N([.F128])-N([.E12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8]+N([.F129])-N([.E12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29]+N([.F130])-N([.E13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0]+N([.F131])-N([.E13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1]+N([.F132])-N([.E13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2]+N([.F133])-N([.E13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3]+N([.F134])-N([.E13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4]+N([.F135])-N([.E13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2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5]+N([.F136])-N([.E13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6]+N([.F137])-N([.E13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7]+N([.F138])-N([.E13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8]+N([.F139])-N([.E13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39]+N([.F140])-N([.E14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0]+N([.F141])-N([.E14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1]+N([.F142])-N([.E14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2]+N([.F143])-N([.E14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3]+N([.F144])-N([.E14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4]+N([.F145])-N([.E14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3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5]+N([.F146])-N([.E14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6]+N([.F147])-N([.E14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7]+N([.F148])-N([.E14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8]+N([.F149])-N([.E14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49]+N([.F150])-N([.E15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0]+N([.F151])-N([.E15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1]+N([.F152])-N([.E15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2]+N([.F153])-N([.E15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3]+N([.F154])-N([.E15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4]+N([.F155])-N([.E15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4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5]+N([.F156])-N([.E15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6]+N([.F157])-N([.E15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7]+N([.F158])-N([.E15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8]+N([.F159])-N([.E15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59]+N([.F160])-N([.E16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0]+N([.F161])-N([.E16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1]+N([.F162])-N([.E16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2]+N([.F163])-N([.E16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3]+N([.F164])-N([.E16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4]+N([.F165])-N([.E16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5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5]+N([.F166])-N([.E16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6]+N([.F167])-N([.E16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7]+N([.F168])-N([.E16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8]+N([.F169])-N([.E16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69]+N([.F170])-N([.E17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0]+N([.F171])-N([.E17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1]+N([.F172])-N([.E17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2]+N([.F173])-N([.E17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3]+N([.F174])-N([.E17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4]+N([.F175])-N([.E17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6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5]+N([.F176])-N([.E17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6]+N([.F177])-N([.E17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7]+N([.F178])-N([.E17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8]+N([.F179])-N([.E17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79]+N([.F180])-N([.E18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0]+N([.F181])-N([.E18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1]+N([.F182])-N([.E18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2]+N([.F183])-N([.E18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3]+N([.F184])-N([.E18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4]+N([.F185])-N([.E18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7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5]+N([.F186])-N([.E18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6]+N([.F187])-N([.E18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7]+N([.F188])-N([.E18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8]+N([.F189])-N([.E18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89]+N([.F190])-N([.E19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0]+N([.F191])-N([.E19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1]+N([.F192])-N([.E19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2]+N([.F193])-N([.E19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3]+N([.F194])-N([.E19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4]+N([.F195])-N([.E19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8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5]+N([.F196])-N([.E19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6]+N([.F197])-N([.E19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1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7]+N([.F198])-N([.E198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2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8]+N([.F199])-N([.E199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3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199]+N([.F200])-N([.E200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4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00]+N([.F201])-N([.E201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5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01]+N([.F202])-N([.E202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6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02]+N([.F203])-N([.E203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7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03]+N([.F204])-N([.E204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8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04]+N([.F205])-N([.E205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199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05]+N([.F206])-N([.E206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  <table:table-row table:style-name="RowDefault">
          <table:table-cell table:style-name="CellBody" office:value-type="float" office:value="200">
            <text:p text:style-name="PBody"/>
          </table:table-cell>
          <table:table-cell table:style-name="CellDate" office:value-type="string">
            <text:p text:style-name="PBody"/>
          </table:table-cell>
          <table:table-cell table:style-name="CellBody" office:value-type="string" table:content-validation-name="validation_category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Money">
            <text:p text:style-name="PBody"/>
          </table:table-cell>
          <table:table-cell table:style-name="CellMoney">
            <text:p text:style-name="PBody"/>
          </table:table-cell>
          <table:table-cell table:style-name="CellMoneyFormula" office:value-type="float" office:value="0" table:formula="=[.G206]+N([.F207])-N([.E207])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 table:content-validation-name="validation_paid_status">
            <text:p text:style-name="PBody"/>
          </table:table-cell>
          <table:table-cell table:style-name="CellBody" office:value-type="string" table:content-validation-name="validation_settlement_status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  <table:table-cell table:style-name="CellBody" office:value-type="string">
            <text:p text:style-name="PBody"/>
          </table:table-cell>
        </table:table-row>
      </table:table>
      <table:table table:name="活動彙總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row table:style-name="RowTitle">
          <table:table-cell table:style-name="CellTitle" office:value-type="string" table:number-columns-spanned="7">
            <text:p text:style-name="PTitle">活動彙總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Header">
          <table:table-cell table:style-name="CellSummaryHeader" office:value-type="string">
            <text:p text:style-name="PHeader">對應活動</text:p>
          </table:table-cell>
          <table:table-cell table:style-name="CellSummaryHeader" office:value-type="string">
            <text:p text:style-name="PHeader">支出總額</text:p>
          </table:table-cell>
          <table:table-cell table:style-name="CellSummaryHeader" office:value-type="string">
            <text:p text:style-name="PHeader">收入總額</text:p>
          </table:table-cell>
          <table:table-cell table:style-name="CellSummaryHeader" office:value-type="string">
            <text:p text:style-name="PHeader">活動淨額</text:p>
          </table:table-cell>
          <table:table-cell table:style-name="CellSummaryHeader" office:value-type="string">
            <text:p text:style-name="PHeader">未撥款筆數</text:p>
          </table:table-cell>
          <table:table-cell table:style-name="CellSummaryHeader" office:value-type="string">
            <text:p text:style-name="PHeader">未列入活動結算筆數</text:p>
          </table:table-cell>
          <table:table-cell table:style-name="CellSummaryHeader" office:value-type="string">
            <text:p text:style-name="PHeader">備註</text:p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3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3];['收支明細'.$F$8:'收支明細'.$F$207])">
            <text:p text:style-name="PBody"/>
          </table:table-cell>
          <table:table-cell table:style-name="CellSummaryFormula" office:value-type="float" office:value="0" table:formula="=[.C3]-[.B3]">
            <text:p text:style-name="PBody"/>
          </table:table-cell>
          <table:table-cell table:style-name="CellSummaryFormula" office:value-type="float" office:value="0" table:formula="=COUNTIFS(['收支明細'.$K$8:'收支明細'.$K$207];[.A3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3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4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4];['收支明細'.$F$8:'收支明細'.$F$207])">
            <text:p text:style-name="PBody"/>
          </table:table-cell>
          <table:table-cell table:style-name="CellSummaryFormula" office:value-type="float" office:value="0" table:formula="=[.C4]-[.B4]">
            <text:p text:style-name="PBody"/>
          </table:table-cell>
          <table:table-cell table:style-name="CellSummaryFormula" office:value-type="float" office:value="0" table:formula="=COUNTIFS(['收支明細'.$K$8:'收支明細'.$K$207];[.A4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4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5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5];['收支明細'.$F$8:'收支明細'.$F$207])">
            <text:p text:style-name="PBody"/>
          </table:table-cell>
          <table:table-cell table:style-name="CellSummaryFormula" office:value-type="float" office:value="0" table:formula="=[.C5]-[.B5]">
            <text:p text:style-name="PBody"/>
          </table:table-cell>
          <table:table-cell table:style-name="CellSummaryFormula" office:value-type="float" office:value="0" table:formula="=COUNTIFS(['收支明細'.$K$8:'收支明細'.$K$207];[.A5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5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6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6];['收支明細'.$F$8:'收支明細'.$F$207])">
            <text:p text:style-name="PBody"/>
          </table:table-cell>
          <table:table-cell table:style-name="CellSummaryFormula" office:value-type="float" office:value="0" table:formula="=[.C6]-[.B6]">
            <text:p text:style-name="PBody"/>
          </table:table-cell>
          <table:table-cell table:style-name="CellSummaryFormula" office:value-type="float" office:value="0" table:formula="=COUNTIFS(['收支明細'.$K$8:'收支明細'.$K$207];[.A6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6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7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7];['收支明細'.$F$8:'收支明細'.$F$207])">
            <text:p text:style-name="PBody"/>
          </table:table-cell>
          <table:table-cell table:style-name="CellSummaryFormula" office:value-type="float" office:value="0" table:formula="=[.C7]-[.B7]">
            <text:p text:style-name="PBody"/>
          </table:table-cell>
          <table:table-cell table:style-name="CellSummaryFormula" office:value-type="float" office:value="0" table:formula="=COUNTIFS(['收支明細'.$K$8:'收支明細'.$K$207];[.A7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7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8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8];['收支明細'.$F$8:'收支明細'.$F$207])">
            <text:p text:style-name="PBody"/>
          </table:table-cell>
          <table:table-cell table:style-name="CellSummaryFormula" office:value-type="float" office:value="0" table:formula="=[.C8]-[.B8]">
            <text:p text:style-name="PBody"/>
          </table:table-cell>
          <table:table-cell table:style-name="CellSummaryFormula" office:value-type="float" office:value="0" table:formula="=COUNTIFS(['收支明細'.$K$8:'收支明細'.$K$207];[.A8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8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9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9];['收支明細'.$F$8:'收支明細'.$F$207])">
            <text:p text:style-name="PBody"/>
          </table:table-cell>
          <table:table-cell table:style-name="CellSummaryFormula" office:value-type="float" office:value="0" table:formula="=[.C9]-[.B9]">
            <text:p text:style-name="PBody"/>
          </table:table-cell>
          <table:table-cell table:style-name="CellSummaryFormula" office:value-type="float" office:value="0" table:formula="=COUNTIFS(['收支明細'.$K$8:'收支明細'.$K$207];[.A9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9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0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0];['收支明細'.$F$8:'收支明細'.$F$207])">
            <text:p text:style-name="PBody"/>
          </table:table-cell>
          <table:table-cell table:style-name="CellSummaryFormula" office:value-type="float" office:value="0" table:formula="=[.C10]-[.B10]">
            <text:p text:style-name="PBody"/>
          </table:table-cell>
          <table:table-cell table:style-name="CellSummaryFormula" office:value-type="float" office:value="0" table:formula="=COUNTIFS(['收支明細'.$K$8:'收支明細'.$K$207];[.A10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0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1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1];['收支明細'.$F$8:'收支明細'.$F$207])">
            <text:p text:style-name="PBody"/>
          </table:table-cell>
          <table:table-cell table:style-name="CellSummaryFormula" office:value-type="float" office:value="0" table:formula="=[.C11]-[.B11]">
            <text:p text:style-name="PBody"/>
          </table:table-cell>
          <table:table-cell table:style-name="CellSummaryFormula" office:value-type="float" office:value="0" table:formula="=COUNTIFS(['收支明細'.$K$8:'收支明細'.$K$207];[.A11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1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2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2];['收支明細'.$F$8:'收支明細'.$F$207])">
            <text:p text:style-name="PBody"/>
          </table:table-cell>
          <table:table-cell table:style-name="CellSummaryFormula" office:value-type="float" office:value="0" table:formula="=[.C12]-[.B12]">
            <text:p text:style-name="PBody"/>
          </table:table-cell>
          <table:table-cell table:style-name="CellSummaryFormula" office:value-type="float" office:value="0" table:formula="=COUNTIFS(['收支明細'.$K$8:'收支明細'.$K$207];[.A12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2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3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3];['收支明細'.$F$8:'收支明細'.$F$207])">
            <text:p text:style-name="PBody"/>
          </table:table-cell>
          <table:table-cell table:style-name="CellSummaryFormula" office:value-type="float" office:value="0" table:formula="=[.C13]-[.B13]">
            <text:p text:style-name="PBody"/>
          </table:table-cell>
          <table:table-cell table:style-name="CellSummaryFormula" office:value-type="float" office:value="0" table:formula="=COUNTIFS(['收支明細'.$K$8:'收支明細'.$K$207];[.A13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3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4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4];['收支明細'.$F$8:'收支明細'.$F$207])">
            <text:p text:style-name="PBody"/>
          </table:table-cell>
          <table:table-cell table:style-name="CellSummaryFormula" office:value-type="float" office:value="0" table:formula="=[.C14]-[.B14]">
            <text:p text:style-name="PBody"/>
          </table:table-cell>
          <table:table-cell table:style-name="CellSummaryFormula" office:value-type="float" office:value="0" table:formula="=COUNTIFS(['收支明細'.$K$8:'收支明細'.$K$207];[.A14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4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5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5];['收支明細'.$F$8:'收支明細'.$F$207])">
            <text:p text:style-name="PBody"/>
          </table:table-cell>
          <table:table-cell table:style-name="CellSummaryFormula" office:value-type="float" office:value="0" table:formula="=[.C15]-[.B15]">
            <text:p text:style-name="PBody"/>
          </table:table-cell>
          <table:table-cell table:style-name="CellSummaryFormula" office:value-type="float" office:value="0" table:formula="=COUNTIFS(['收支明細'.$K$8:'收支明細'.$K$207];[.A15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5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6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6];['收支明細'.$F$8:'收支明細'.$F$207])">
            <text:p text:style-name="PBody"/>
          </table:table-cell>
          <table:table-cell table:style-name="CellSummaryFormula" office:value-type="float" office:value="0" table:formula="=[.C16]-[.B16]">
            <text:p text:style-name="PBody"/>
          </table:table-cell>
          <table:table-cell table:style-name="CellSummaryFormula" office:value-type="float" office:value="0" table:formula="=COUNTIFS(['收支明細'.$K$8:'收支明細'.$K$207];[.A16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6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7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7];['收支明細'.$F$8:'收支明細'.$F$207])">
            <text:p text:style-name="PBody"/>
          </table:table-cell>
          <table:table-cell table:style-name="CellSummaryFormula" office:value-type="float" office:value="0" table:formula="=[.C17]-[.B17]">
            <text:p text:style-name="PBody"/>
          </table:table-cell>
          <table:table-cell table:style-name="CellSummaryFormula" office:value-type="float" office:value="0" table:formula="=COUNTIFS(['收支明細'.$K$8:'收支明細'.$K$207];[.A17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7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8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8];['收支明細'.$F$8:'收支明細'.$F$207])">
            <text:p text:style-name="PBody"/>
          </table:table-cell>
          <table:table-cell table:style-name="CellSummaryFormula" office:value-type="float" office:value="0" table:formula="=[.C18]-[.B18]">
            <text:p text:style-name="PBody"/>
          </table:table-cell>
          <table:table-cell table:style-name="CellSummaryFormula" office:value-type="float" office:value="0" table:formula="=COUNTIFS(['收支明細'.$K$8:'收支明細'.$K$207];[.A18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8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19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19];['收支明細'.$F$8:'收支明細'.$F$207])">
            <text:p text:style-name="PBody"/>
          </table:table-cell>
          <table:table-cell table:style-name="CellSummaryFormula" office:value-type="float" office:value="0" table:formula="=[.C19]-[.B19]">
            <text:p text:style-name="PBody"/>
          </table:table-cell>
          <table:table-cell table:style-name="CellSummaryFormula" office:value-type="float" office:value="0" table:formula="=COUNTIFS(['收支明細'.$K$8:'收支明細'.$K$207];[.A19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19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0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0];['收支明細'.$F$8:'收支明細'.$F$207])">
            <text:p text:style-name="PBody"/>
          </table:table-cell>
          <table:table-cell table:style-name="CellSummaryFormula" office:value-type="float" office:value="0" table:formula="=[.C20]-[.B20]">
            <text:p text:style-name="PBody"/>
          </table:table-cell>
          <table:table-cell table:style-name="CellSummaryFormula" office:value-type="float" office:value="0" table:formula="=COUNTIFS(['收支明細'.$K$8:'收支明細'.$K$207];[.A20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0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1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1];['收支明細'.$F$8:'收支明細'.$F$207])">
            <text:p text:style-name="PBody"/>
          </table:table-cell>
          <table:table-cell table:style-name="CellSummaryFormula" office:value-type="float" office:value="0" table:formula="=[.C21]-[.B21]">
            <text:p text:style-name="PBody"/>
          </table:table-cell>
          <table:table-cell table:style-name="CellSummaryFormula" office:value-type="float" office:value="0" table:formula="=COUNTIFS(['收支明細'.$K$8:'收支明細'.$K$207];[.A21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1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2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2];['收支明細'.$F$8:'收支明細'.$F$207])">
            <text:p text:style-name="PBody"/>
          </table:table-cell>
          <table:table-cell table:style-name="CellSummaryFormula" office:value-type="float" office:value="0" table:formula="=[.C22]-[.B22]">
            <text:p text:style-name="PBody"/>
          </table:table-cell>
          <table:table-cell table:style-name="CellSummaryFormula" office:value-type="float" office:value="0" table:formula="=COUNTIFS(['收支明細'.$K$8:'收支明細'.$K$207];[.A22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2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3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3];['收支明細'.$F$8:'收支明細'.$F$207])">
            <text:p text:style-name="PBody"/>
          </table:table-cell>
          <table:table-cell table:style-name="CellSummaryFormula" office:value-type="float" office:value="0" table:formula="=[.C23]-[.B23]">
            <text:p text:style-name="PBody"/>
          </table:table-cell>
          <table:table-cell table:style-name="CellSummaryFormula" office:value-type="float" office:value="0" table:formula="=COUNTIFS(['收支明細'.$K$8:'收支明細'.$K$207];[.A23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3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4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4];['收支明細'.$F$8:'收支明細'.$F$207])">
            <text:p text:style-name="PBody"/>
          </table:table-cell>
          <table:table-cell table:style-name="CellSummaryFormula" office:value-type="float" office:value="0" table:formula="=[.C24]-[.B24]">
            <text:p text:style-name="PBody"/>
          </table:table-cell>
          <table:table-cell table:style-name="CellSummaryFormula" office:value-type="float" office:value="0" table:formula="=COUNTIFS(['收支明細'.$K$8:'收支明細'.$K$207];[.A24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4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5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5];['收支明細'.$F$8:'收支明細'.$F$207])">
            <text:p text:style-name="PBody"/>
          </table:table-cell>
          <table:table-cell table:style-name="CellSummaryFormula" office:value-type="float" office:value="0" table:formula="=[.C25]-[.B25]">
            <text:p text:style-name="PBody"/>
          </table:table-cell>
          <table:table-cell table:style-name="CellSummaryFormula" office:value-type="float" office:value="0" table:formula="=COUNTIFS(['收支明細'.$K$8:'收支明細'.$K$207];[.A25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5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6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6];['收支明細'.$F$8:'收支明細'.$F$207])">
            <text:p text:style-name="PBody"/>
          </table:table-cell>
          <table:table-cell table:style-name="CellSummaryFormula" office:value-type="float" office:value="0" table:formula="=[.C26]-[.B26]">
            <text:p text:style-name="PBody"/>
          </table:table-cell>
          <table:table-cell table:style-name="CellSummaryFormula" office:value-type="float" office:value="0" table:formula="=COUNTIFS(['收支明細'.$K$8:'收支明細'.$K$207];[.A26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6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7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7];['收支明細'.$F$8:'收支明細'.$F$207])">
            <text:p text:style-name="PBody"/>
          </table:table-cell>
          <table:table-cell table:style-name="CellSummaryFormula" office:value-type="float" office:value="0" table:formula="=[.C27]-[.B27]">
            <text:p text:style-name="PBody"/>
          </table:table-cell>
          <table:table-cell table:style-name="CellSummaryFormula" office:value-type="float" office:value="0" table:formula="=COUNTIFS(['收支明細'.$K$8:'收支明細'.$K$207];[.A27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7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8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8];['收支明細'.$F$8:'收支明細'.$F$207])">
            <text:p text:style-name="PBody"/>
          </table:table-cell>
          <table:table-cell table:style-name="CellSummaryFormula" office:value-type="float" office:value="0" table:formula="=[.C28]-[.B28]">
            <text:p text:style-name="PBody"/>
          </table:table-cell>
          <table:table-cell table:style-name="CellSummaryFormula" office:value-type="float" office:value="0" table:formula="=COUNTIFS(['收支明細'.$K$8:'收支明細'.$K$207];[.A28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8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29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29];['收支明細'.$F$8:'收支明細'.$F$207])">
            <text:p text:style-name="PBody"/>
          </table:table-cell>
          <table:table-cell table:style-name="CellSummaryFormula" office:value-type="float" office:value="0" table:formula="=[.C29]-[.B29]">
            <text:p text:style-name="PBody"/>
          </table:table-cell>
          <table:table-cell table:style-name="CellSummaryFormula" office:value-type="float" office:value="0" table:formula="=COUNTIFS(['收支明細'.$K$8:'收支明細'.$K$207];[.A29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29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30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30];['收支明細'.$F$8:'收支明細'.$F$207])">
            <text:p text:style-name="PBody"/>
          </table:table-cell>
          <table:table-cell table:style-name="CellSummaryFormula" office:value-type="float" office:value="0" table:formula="=[.C30]-[.B30]">
            <text:p text:style-name="PBody"/>
          </table:table-cell>
          <table:table-cell table:style-name="CellSummaryFormula" office:value-type="float" office:value="0" table:formula="=COUNTIFS(['收支明細'.$K$8:'收支明細'.$K$207];[.A30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30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31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31];['收支明細'.$F$8:'收支明細'.$F$207])">
            <text:p text:style-name="PBody"/>
          </table:table-cell>
          <table:table-cell table:style-name="CellSummaryFormula" office:value-type="float" office:value="0" table:formula="=[.C31]-[.B31]">
            <text:p text:style-name="PBody"/>
          </table:table-cell>
          <table:table-cell table:style-name="CellSummaryFormula" office:value-type="float" office:value="0" table:formula="=COUNTIFS(['收支明細'.$K$8:'收支明細'.$K$207];[.A31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31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/>
          </table:table-cell>
          <table:table-cell table:style-name="CellSummaryFormula" office:value-type="float" office:value="0" table:formula="=SUMIF(['收支明細'.$K$8:'收支明細'.$K$207];[.A32];['收支明細'.$E$8:'收支明細'.$E$207])">
            <text:p text:style-name="PBody"/>
          </table:table-cell>
          <table:table-cell table:style-name="CellSummaryFormula" office:value-type="float" office:value="0" table:formula="=SUMIF(['收支明細'.$K$8:'收支明細'.$K$207];[.A32];['收支明細'.$F$8:'收支明細'.$F$207])">
            <text:p text:style-name="PBody"/>
          </table:table-cell>
          <table:table-cell table:style-name="CellSummaryFormula" office:value-type="float" office:value="0" table:formula="=[.C32]-[.B32]">
            <text:p text:style-name="PBody"/>
          </table:table-cell>
          <table:table-cell table:style-name="CellSummaryFormula" office:value-type="float" office:value="0" table:formula="=COUNTIFS(['收支明細'.$K$8:'收支明細'.$K$207];[.A32];['收支明細'.$I$8:'收支明細'.$I$207];&quot;否&quot;)">
            <text:p text:style-name="PBody"/>
          </table:table-cell>
          <table:table-cell table:style-name="CellSummaryFormula" office:value-type="float" office:value="0" table:formula="=COUNTIFS(['收支明細'.$K$8:'收支明細'.$K$207];[.A32];['收支明細'.$J$8:'收支明細'.$J$207];&quot;否&quot;)">
            <text:p text:style-name="PBody"/>
          </table:table-cell>
          <table:table-cell table:style-name="CellSummaryText" office:value-type="string">
            <text:p text:style-name="PBody"/>
          </table:table-cell>
        </table:table-row>
      </table:table>
      <table:table table:name="類別彙總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row table:style-name="RowTitle">
          <table:table-cell table:style-name="CellTitle" office:value-type="string" table:number-columns-spanned="5">
            <text:p text:style-name="PTitle">類別彙總</text:p>
          </table:table-cell>
          <table:covered-table-cell/>
          <table:covered-table-cell/>
          <table:covered-table-cell/>
          <table:covered-table-cell/>
        </table:table-row>
        <table:table-row table:style-name="RowHeader">
          <table:table-cell table:style-name="CellSummaryHeader" office:value-type="string">
            <text:p text:style-name="PHeader">類別</text:p>
          </table:table-cell>
          <table:table-cell table:style-name="CellSummaryHeader" office:value-type="string">
            <text:p text:style-name="PHeader">支出總額</text:p>
          </table:table-cell>
          <table:table-cell table:style-name="CellSummaryHeader" office:value-type="string">
            <text:p text:style-name="PHeader">收入總額</text:p>
          </table:table-cell>
          <table:table-cell table:style-name="CellSummaryHeader" office:value-type="string">
            <text:p text:style-name="PHeader">淨額</text:p>
          </table:table-cell>
          <table:table-cell table:style-name="CellSummaryHeader" office:value-type="string">
            <text:p text:style-name="PHeader">備註</text:p>
          </table:table-cell>
        </table:table-row>
        <table:table-row table:style-name="RowSummary">
          <table:table-cell table:style-name="CellSummaryText" office:value-type="string">
            <text:p text:style-name="PBody">結餘</text:p>
          </table:table-cell>
          <table:table-cell table:style-name="CellSummaryFormula" office:value-type="float" office:value="0" table:formula="=SUMIF(['收支明細'.$C$8:'收支明細'.$C$207];[.A3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3];['收支明細'.$F$8:'收支明細'.$F$207])">
            <text:p text:style-name="PBody"/>
          </table:table-cell>
          <table:table-cell table:style-name="CellSummaryFormula" office:value-type="float" office:value="0" table:formula="=[.C3]-[.B3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補助收入</text:p>
          </table:table-cell>
          <table:table-cell table:style-name="CellSummaryFormula" office:value-type="float" office:value="0" table:formula="=SUMIF(['收支明細'.$C$8:'收支明細'.$C$207];[.A4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4];['收支明細'.$F$8:'收支明細'.$F$207])">
            <text:p text:style-name="PBody"/>
          </table:table-cell>
          <table:table-cell table:style-name="CellSummaryFormula" office:value-type="float" office:value="0" table:formula="=[.C4]-[.B4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餐食費</text:p>
          </table:table-cell>
          <table:table-cell table:style-name="CellSummaryFormula" office:value-type="float" office:value="0" table:formula="=SUMIF(['收支明細'.$C$8:'收支明細'.$C$207];[.A5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5];['收支明細'.$F$8:'收支明細'.$F$207])">
            <text:p text:style-name="PBody"/>
          </table:table-cell>
          <table:table-cell table:style-name="CellSummaryFormula" office:value-type="float" office:value="0" table:formula="=[.C5]-[.B5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交通費</text:p>
          </table:table-cell>
          <table:table-cell table:style-name="CellSummaryFormula" office:value-type="float" office:value="0" table:formula="=SUMIF(['收支明細'.$C$8:'收支明細'.$C$207];[.A6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6];['收支明細'.$F$8:'收支明細'.$F$207])">
            <text:p text:style-name="PBody"/>
          </table:table-cell>
          <table:table-cell table:style-name="CellSummaryFormula" office:value-type="float" office:value="0" table:formula="=[.C6]-[.B6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保險費</text:p>
          </table:table-cell>
          <table:table-cell table:style-name="CellSummaryFormula" office:value-type="float" office:value="0" table:formula="=SUMIF(['收支明細'.$C$8:'收支明細'.$C$207];[.A7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7];['收支明細'.$F$8:'收支明細'.$F$207])">
            <text:p text:style-name="PBody"/>
          </table:table-cell>
          <table:table-cell table:style-name="CellSummaryFormula" office:value-type="float" office:value="0" table:formula="=[.C7]-[.B7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印刷費</text:p>
          </table:table-cell>
          <table:table-cell table:style-name="CellSummaryFormula" office:value-type="float" office:value="0" table:formula="=SUMIF(['收支明細'.$C$8:'收支明細'.$C$207];[.A8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8];['收支明細'.$F$8:'收支明細'.$F$207])">
            <text:p text:style-name="PBody"/>
          </table:table-cell>
          <table:table-cell table:style-name="CellSummaryFormula" office:value-type="float" office:value="0" table:formula="=[.C8]-[.B8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道具費</text:p>
          </table:table-cell>
          <table:table-cell table:style-name="CellSummaryFormula" office:value-type="float" office:value="0" table:formula="=SUMIF(['收支明細'.$C$8:'收支明細'.$C$207];[.A9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9];['收支明細'.$F$8:'收支明細'.$F$207])">
            <text:p text:style-name="PBody"/>
          </table:table-cell>
          <table:table-cell table:style-name="CellSummaryFormula" office:value-type="float" office:value="0" table:formula="=[.C9]-[.B9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活動費</text:p>
          </table:table-cell>
          <table:table-cell table:style-name="CellSummaryFormula" office:value-type="float" office:value="0" table:formula="=SUMIF(['收支明細'.$C$8:'收支明細'.$C$207];[.A10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0];['收支明細'.$F$8:'收支明細'.$F$207])">
            <text:p text:style-name="PBody"/>
          </table:table-cell>
          <table:table-cell table:style-name="CellSummaryFormula" office:value-type="float" office:value="0" table:formula="=[.C10]-[.B10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活動支出</text:p>
          </table:table-cell>
          <table:table-cell table:style-name="CellSummaryFormula" office:value-type="float" office:value="0" table:formula="=SUMIF(['收支明細'.$C$8:'收支明細'.$C$207];[.A11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1];['收支明細'.$F$8:'收支明細'.$F$207])">
            <text:p text:style-name="PBody"/>
          </table:table-cell>
          <table:table-cell table:style-name="CellSummaryFormula" office:value-type="float" office:value="0" table:formula="=[.C11]-[.B11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器材費</text:p>
          </table:table-cell>
          <table:table-cell table:style-name="CellSummaryFormula" office:value-type="float" office:value="0" table:formula="=SUMIF(['收支明細'.$C$8:'收支明細'.$C$207];[.A12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2];['收支明細'.$F$8:'收支明細'.$F$207])">
            <text:p text:style-name="PBody"/>
          </table:table-cell>
          <table:table-cell table:style-name="CellSummaryFormula" office:value-type="float" office:value="0" table:formula="=[.C12]-[.B12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場地費</text:p>
          </table:table-cell>
          <table:table-cell table:style-name="CellSummaryFormula" office:value-type="float" office:value="0" table:formula="=SUMIF(['收支明細'.$C$8:'收支明細'.$C$207];[.A13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3];['收支明細'.$F$8:'收支明細'.$F$207])">
            <text:p text:style-name="PBody"/>
          </table:table-cell>
          <table:table-cell table:style-name="CellSummaryFormula" office:value-type="float" office:value="0" table:formula="=[.C13]-[.B13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講師費</text:p>
          </table:table-cell>
          <table:table-cell table:style-name="CellSummaryFormula" office:value-type="float" office:value="0" table:formula="=SUMIF(['收支明細'.$C$8:'收支明細'.$C$207];[.A14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4];['收支明細'.$F$8:'收支明細'.$F$207])">
            <text:p text:style-name="PBody"/>
          </table:table-cell>
          <table:table-cell table:style-name="CellSummaryFormula" office:value-type="float" office:value="0" table:formula="=[.C14]-[.B14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文具費</text:p>
          </table:table-cell>
          <table:table-cell table:style-name="CellSummaryFormula" office:value-type="float" office:value="0" table:formula="=SUMIF(['收支明細'.$C$8:'收支明細'.$C$207];[.A15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5];['收支明細'.$F$8:'收支明細'.$F$207])">
            <text:p text:style-name="PBody"/>
          </table:table-cell>
          <table:table-cell table:style-name="CellSummaryFormula" office:value-type="float" office:value="0" table:formula="=[.C15]-[.B15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社費</text:p>
          </table:table-cell>
          <table:table-cell table:style-name="CellSummaryFormula" office:value-type="float" office:value="0" table:formula="=SUMIF(['收支明細'.$C$8:'收支明細'.$C$207];[.A16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6];['收支明細'.$F$8:'收支明細'.$F$207])">
            <text:p text:style-name="PBody"/>
          </table:table-cell>
          <table:table-cell table:style-name="CellSummaryFormula" office:value-type="float" office:value="0" table:formula="=[.C16]-[.B16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學校補助</text:p>
          </table:table-cell>
          <table:table-cell table:style-name="CellSummaryFormula" office:value-type="float" office:value="0" table:formula="=SUMIF(['收支明細'.$C$8:'收支明細'.$C$207];[.A17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7];['收支明細'.$F$8:'收支明細'.$F$207])">
            <text:p text:style-name="PBody"/>
          </table:table-cell>
          <table:table-cell table:style-name="CellSummaryFormula" office:value-type="float" office:value="0" table:formula="=[.C17]-[.B17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校外補助</text:p>
          </table:table-cell>
          <table:table-cell table:style-name="CellSummaryFormula" office:value-type="float" office:value="0" table:formula="=SUMIF(['收支明細'.$C$8:'收支明細'.$C$207];[.A18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8];['收支明細'.$F$8:'收支明細'.$F$207])">
            <text:p text:style-name="PBody"/>
          </table:table-cell>
          <table:table-cell table:style-name="CellSummaryFormula" office:value-type="float" office:value="0" table:formula="=[.C18]-[.B18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合作單位補助</text:p>
          </table:table-cell>
          <table:table-cell table:style-name="CellSummaryFormula" office:value-type="float" office:value="0" table:formula="=SUMIF(['收支明細'.$C$8:'收支明細'.$C$207];[.A19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19];['收支明細'.$F$8:'收支明細'.$F$207])">
            <text:p text:style-name="PBody"/>
          </table:table-cell>
          <table:table-cell table:style-name="CellSummaryFormula" office:value-type="float" office:value="0" table:formula="=[.C19]-[.B19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活動收入</text:p>
          </table:table-cell>
          <table:table-cell table:style-name="CellSummaryFormula" office:value-type="float" office:value="0" table:formula="=SUMIF(['收支明細'.$C$8:'收支明細'.$C$207];[.A20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20];['收支明細'.$F$8:'收支明細'.$F$207])">
            <text:p text:style-name="PBody"/>
          </table:table-cell>
          <table:table-cell table:style-name="CellSummaryFormula" office:value-type="float" office:value="0" table:formula="=[.C20]-[.B20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利息</text:p>
          </table:table-cell>
          <table:table-cell table:style-name="CellSummaryFormula" office:value-type="float" office:value="0" table:formula="=SUMIF(['收支明細'.$C$8:'收支明細'.$C$207];[.A21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21];['收支明細'.$F$8:'收支明細'.$F$207])">
            <text:p text:style-name="PBody"/>
          </table:table-cell>
          <table:table-cell table:style-name="CellSummaryFormula" office:value-type="float" office:value="0" table:formula="=[.C21]-[.B21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其他收入</text:p>
          </table:table-cell>
          <table:table-cell table:style-name="CellSummaryFormula" office:value-type="float" office:value="0" table:formula="=SUMIF(['收支明細'.$C$8:'收支明細'.$C$207];[.A22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22];['收支明細'.$F$8:'收支明細'.$F$207])">
            <text:p text:style-name="PBody"/>
          </table:table-cell>
          <table:table-cell table:style-name="CellSummaryFormula" office:value-type="float" office:value="0" table:formula="=[.C22]-[.B22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  <table:table-row table:style-name="RowSummary">
          <table:table-cell table:style-name="CellSummaryText" office:value-type="string">
            <text:p text:style-name="PBody">其他支出</text:p>
          </table:table-cell>
          <table:table-cell table:style-name="CellSummaryFormula" office:value-type="float" office:value="0" table:formula="=SUMIF(['收支明細'.$C$8:'收支明細'.$C$207];[.A23];['收支明細'.$E$8:'收支明細'.$E$207])">
            <text:p text:style-name="PBody"/>
          </table:table-cell>
          <table:table-cell table:style-name="CellSummaryFormula" office:value-type="float" office:value="0" table:formula="=SUMIF(['收支明細'.$C$8:'收支明細'.$C$207];[.A23];['收支明細'.$F$8:'收支明細'.$F$207])">
            <text:p text:style-name="PBody"/>
          </table:table-cell>
          <table:table-cell table:style-name="CellSummaryFormula" office:value-type="float" office:value="0" table:formula="=[.C23]-[.B23]">
            <text:p text:style-name="PBody"/>
          </table:table-cell>
          <table:table-cell table:style-name="CellSummaryText" office:value-type="string">
            <text:p text:style-name="PBody"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paragraph">
      <style:text-properties fo:font-family="DFKai-SB, BiauKai, Noto Serif CJK TC, Noto Sans CJK TC, serif" fo:font-size="12pt"/>
    </style:default-style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/>
</office:document-meta>
</file>