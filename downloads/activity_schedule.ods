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xmlns:of="urn:oasis:names:tc:opendocument:xmlns:of:1.2" office:version="1.2">
  <office:scripts/>
  <office:automatic-styles>
    <style:style style:name="Co1" style:family="table-column">
      <style:table-column-properties style:column-width="3.1cm"/>
    </style:style>
    <style:style style:name="Co2" style:family="table-column">
      <style:table-column-properties style:column-width="2.2cm"/>
    </style:style>
    <style:style style:name="Co3" style:family="table-column">
      <style:table-column-properties style:column-width="6.0cm"/>
    </style:style>
    <style:style style:name="Co4" style:family="table-column">
      <style:table-column-properties style:column-width="3.6cm"/>
    </style:style>
    <style:style style:name="Co5" style:family="table-column">
      <style:table-column-properties style:column-width="4.4cm"/>
    </style:style>
    <style:style style:name="Co1" style:family="table-column">
      <style:table-column-properties style:column-width="3.1cm"/>
    </style:style>
    <style:style style:name="Co2" style:family="table-column">
      <style:table-column-properties style:column-width="4.0cm"/>
    </style:style>
    <style:style style:name="Co3" style:family="table-column">
      <style:table-column-properties style:column-width="2.4cm"/>
    </style:style>
    <style:style style:name="Co4" style:family="table-column">
      <style:table-column-properties style:column-width="3.2cm"/>
    </style:style>
    <style:style style:name="Co5" style:family="table-column">
      <style:table-column-properties style:column-width="5.0cm"/>
    </style:style>
    <style:style style:name="Co6" style:family="table-column">
      <style:table-column-properties style:column-width="3.6cm"/>
    </style:style>
    <style:style style:name="Co7" style:family="table-column">
      <style:table-column-properties style:column-width="3.6cm"/>
    </style:style>
    <style:style style:name="Co8" style:family="table-column">
      <style:table-column-properties style:column-width="2.8cm"/>
    </style:style>
    <style:style style:name="Co9" style:family="table-column">
      <style:table-column-properties style:column-width="3.8cm"/>
    </style:style>
    <style:style style:name="RowDefault" style:family="table-row">
      <style:table-row-properties style:row-height="0.7cm"/>
    </style:style>
    <style:style style:name="RowTitle" style:family="table-row">
      <style:table-row-properties style:row-height="0.88cm"/>
    </style:style>
    <style:style style:name="RowHeader" style:family="table-row">
      <style:table-row-properties style:row-height="0.78cm"/>
    </style:style>
    <style:style style:name="RowSummary" style:family="table-row">
      <style:table-row-properties style:row-height="0.72cm"/>
    </style:style>
    <style:style style:name="PTitle" style:family="paragraph">
      <style:paragraph-properties fo:text-align="center"/>
      <style:text-properties fo:font-family="DFKai-SB, BiauKai, Noto Serif CJK TC, Noto Sans CJK TC, serif" fo:font-size="15pt" fo:font-weight="bold"/>
    </style:style>
    <style:style style:name="PHeader" style:family="paragraph">
      <style:paragraph-properties fo:text-align="center"/>
      <style:text-properties fo:font-family="DFKai-SB, BiauKai, Noto Serif CJK TC, Noto Sans CJK TC, serif" fo:font-size="11pt" fo:font-weight="bold"/>
    </style:style>
    <style:style style:name="PLabel" style:family="paragraph">
      <style:text-properties fo:font-family="DFKai-SB, BiauKai, Noto Serif CJK TC, Noto Sans CJK TC, serif" fo:font-size="12pt" fo:font-weight="bold"/>
    </style:style>
    <style:style style:name="PBody" style:family="paragraph">
      <style:text-properties fo:font-family="DFKai-SB, BiauKai, Noto Serif CJK TC, Noto Sans CJK TC, serif" fo:font-size="11pt"/>
    </style:style>
    <style:style style:name="PSmall" style:family="paragraph">
      <style:text-properties fo:font-family="DFKai-SB, BiauKai, Noto Serif CJK TC, Noto Sans CJK TC, serif" fo:font-size="9pt"/>
    </style:style>
    <style:style style:name="CellTitle" style:family="table-cell">
      <style:table-cell-properties fo:border="0.03cm solid #4b5563" fo:padding="0.14cm" fo:background-color="#f8fafc"/>
    </style:style>
    <style:style style:name="CellLabel" style:family="table-cell">
      <style:table-cell-properties fo:border="0.03cm solid #6b7280" fo:padding="0.12cm" fo:background-color="#eef2ff"/>
    </style:style>
    <style:style style:name="CellValue" style:family="table-cell">
      <style:table-cell-properties fo:border="0.03cm solid #9ca3af" fo:padding="0.12cm"/>
    </style:style>
    <style:style style:name="CellHeader" style:family="table-cell">
      <style:table-cell-properties fo:border="0.03cm solid #374151" fo:padding="0.1cm" fo:background-color="#dbeafe"/>
    </style:style>
    <style:style style:name="CellBody" style:family="table-cell">
      <style:table-cell-properties fo:border="0.03cm solid #cbd5e1" fo:padding="0.09cm"/>
    </style:style>
    <style:style style:name="CellSummaryHeader" style:family="table-cell">
      <style:table-cell-properties fo:border="0.03cm solid #4b5563" fo:padding="0.1cm" fo:background-color="#e5e7eb"/>
    </style:style>
    <style:style style:name="CellSummaryText" style:family="table-cell">
      <style:table-cell-properties fo:border="0.03cm solid #cbd5e1" fo:padding="0.09cm"/>
    </style:style>
    <style:style style:name="CellBlank" style:family="table-cell">
      <style:table-cell-properties fo:border="none" fo:padding="0.08cm"/>
    </style:style>
  </office:automatic-styles>
  <office:body>
    <office:spreadsheet>
      <table:table table:name="粗流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row table:style-name="RowTitle">
          <table:table-cell table:style-name="CellTitle" office:value-type="string" table:number-columns-spanned="5">
            <text:p text:style-name="PTitle">活動流程表</text:p>
          </table:table-cell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社團名稱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名稱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</table:table-row>
        <table:table-row table:style-name="RowDefault">
          <table:table-cell table:style-name="CellLabel" office:value-type="string">
            <text:p text:style-name="PLabel">活動日期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地點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</table:table-row>
        <table:table-row table:style-name="RowDefault">
          <table:table-cell table:style-name="CellLabel" office:value-type="string">
            <text:p text:style-name="PLabel">主辦單位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負責人</text:p>
          </table:table-cell>
          <table:table-cell table:style-name="CellValue" office:value-type="string">
            <text:p text:style-name="PBody"/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聯絡方式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版本／修訂日期</text:p>
          </table:table-cell>
          <table:table-cell table:style-name="CellValue" office:value-type="string">
            <text:p text:style-name="PBody"/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時間</text:p>
          </table:table-cell>
          <table:table-cell table:style-name="CellHeader" office:value-type="string">
            <text:p text:style-name="PHeader">時長</text:p>
          </table:table-cell>
          <table:table-cell table:style-name="CellHeader" office:value-type="string">
            <text:p text:style-name="PHeader">活動名稱</text:p>
          </table:table-cell>
          <table:table-cell table:style-name="CellHeader" office:value-type="string">
            <text:p text:style-name="PHeader">場控／主持</text:p>
          </table:table-cell>
          <table:table-cell table:style-name="CellHeader" office:value-type="string">
            <text:p text:style-name="PHeader">備註</text:p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5">
            <text:p text:style-name="PHeader">工作提醒</text:p>
          </table:table-cell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場地布置時間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報到時間</text:p>
          </table:table-cell>
          <table:table-cell table:style-name="CellValue" office:value-type="string">
            <text:p text:style-name="PBody"/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活動開始時間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結束時間</text:p>
          </table:table-cell>
          <table:table-cell table:style-name="CellValue" office:value-type="string">
            <text:p text:style-name="PBody"/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場復時間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重要注意事項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</table:table-row>
        <table:table-row table:style-name="RowSummary">
          <table:table-cell table:style-name="CellSummaryHeader" office:value-type="string">
            <text:p text:style-name="PHeader">製表人</text:p>
          </table:table-cell>
          <table:table-cell table:style-name="CellSummaryText" office:value-type="string">
            <text:p text:style-name="PBody"/>
          </table:table-cell>
          <table:table-cell table:style-name="CellSummaryHeader" office:value-type="string">
            <text:p text:style-name="PHeader">活動負責人</text:p>
          </table:table-cell>
          <table:table-cell table:style-name="CellSummaryText" office:value-type="string">
            <text:p text:style-name="PBody"/>
          </table:table-cell>
          <table:table-cell table:style-name="CellSummaryText" office:value-type="string">
            <text:p text:style-name="PBody"/>
          </table:table-cell>
        </table:table-row>
      </table:table>
      <table:table table:name="細流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 table:style-name="RowTitle">
          <table:table-cell table:style-name="CellTitle" office:value-type="string" table:number-columns-spanned="9">
            <text:p text:style-name="PTitle">活動流程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社團名稱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  <table:table-cell table:style-name="CellLabel" office:value-type="string">
            <text:p text:style-name="PLabel">活動名稱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  <table:table-cell table:style-name="CellLabel" office:value-type="string">
            <text:p text:style-name="PLabel">活動日期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活動地點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  <table:table-cell table:style-name="CellLabel" office:value-type="string">
            <text:p text:style-name="PLabel">主辦單位</text:p>
          </table:table-cell>
          <table:table-cell table:style-name="CellValue" office:value-type="string" table:number-columns-spanned="2">
            <text:p text:style-name="PBody"/>
          </table:table-cell>
          <table:covered-table-cell/>
          <table:table-cell table:style-name="CellLabel" office:value-type="string">
            <text:p text:style-name="PLabel">活動負責人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大活動時間</text:p>
          </table:table-cell>
          <table:table-cell table:style-name="CellHeader" office:value-type="string">
            <text:p text:style-name="PHeader">大活動名稱</text:p>
          </table:table-cell>
          <table:table-cell table:style-name="CellHeader" office:value-type="string">
            <text:p text:style-name="PHeader">細時間</text:p>
          </table:table-cell>
          <table:table-cell table:style-name="CellHeader" office:value-type="string">
            <text:p text:style-name="PHeader">組別／區域</text:p>
          </table:table-cell>
          <table:table-cell table:style-name="CellHeader" office:value-type="string">
            <text:p text:style-name="PHeader">事項</text:p>
          </table:table-cell>
          <table:table-cell table:style-name="CellHeader" office:value-type="string">
            <text:p text:style-name="PHeader">備註</text:p>
          </table:table-cell>
          <table:table-cell table:style-name="CellHeader" office:value-type="string">
            <text:p text:style-name="PHeader">器材</text:p>
          </table:table-cell>
          <table:table-cell table:style-name="CellHeader" office:value-type="string">
            <text:p text:style-name="PHeader">負責人</text:p>
          </table:table-cell>
          <table:table-cell table:style-name="CellHeader" office:value-type="string">
            <text:p text:style-name="PHeader">人員</text:p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9">
            <text:p text:style-name="PHeader">確認與簽核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Header" office:value-type="string">
            <text:p text:style-name="PHeader">製表人</text:p>
          </table:table-cell>
          <table:table-cell table:style-name="CellSummaryText" office:value-type="string">
            <text:p text:style-name="PBody"/>
          </table:table-cell>
          <table:table-cell table:style-name="CellSummaryHeader" office:value-type="string">
            <text:p text:style-name="PHeader">活動負責人</text:p>
          </table:table-cell>
          <table:table-cell table:style-name="CellSummaryText" office:value-type="string">
            <text:p text:style-name="PBody"/>
          </table:table-cell>
          <table:table-cell table:style-name="CellSummaryHeader" office:value-type="string">
            <text:p text:style-name="PHeader">社團負責人</text:p>
          </table:table-cell>
          <table:table-cell table:style-name="CellSummaryText" office:value-type="string">
            <text:p text:style-name="PBody"/>
          </table:table-cell>
          <table:table-cell table:style-name="CellSummaryHeader" office:value-type="string">
            <text:p text:style-name="PHeader">指導老師</text:p>
          </table:table-cell>
          <table:table-cell table:style-name="CellSummaryText" office:value-type="string" table:number-columns-spanned="2">
            <text:p text:style-name="PBody"/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fo:font-family="DFKai-SB, BiauKai, Noto Serif CJK TC, Noto Sans CJK TC, serif" fo:font-size="12pt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