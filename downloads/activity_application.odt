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scripts/>
  <office:automatic-styles>
    <style:style style:name="PBody" style:family="paragraph">
      <style:paragraph-properties fo:margin-top="0cm" fo:margin-bottom="0.14cm" fo:line-height="130%"/>
      <style:text-properties fo:font-family="DFKai-SB, BiauKai, Noto Serif CJK TC, Noto Sans CJK TC, serif" fo:font-size="10pt"/>
    </style:style>
    <style:style style:name="PTitle" style:family="paragraph">
      <style:paragraph-properties fo:text-align="center" fo:margin-top="0cm" fo:margin-bottom="0.35cm"/>
      <style:text-properties fo:font-family="DFKai-SB, BiauKai, Noto Serif CJK TC, Noto Sans CJK TC, serif" fo:font-size="20pt" fo:font-weight="bold"/>
    </style:style>
    <style:style style:name="PSection" style:family="paragraph">
      <style:paragraph-properties fo:margin-top="0.28cm" fo:margin-bottom="0.14cm"/>
      <style:text-properties fo:font-family="DFKai-SB, BiauKai, Noto Serif CJK TC, Noto Sans CJK TC, serif" fo:font-size="11pt" fo:font-weight="bold"/>
    </style:style>
    <style:style style:name="PLabel" style:family="paragraph">
      <style:paragraph-properties fo:margin-top="0cm" fo:margin-bottom="0cm"/>
      <style:text-properties fo:font-family="DFKai-SB, BiauKai, Noto Serif CJK TC, Noto Sans CJK TC, serif" fo:font-size="10pt" fo:font-weight="bold"/>
    </style:style>
    <style:style style:name="PTableHeader" style:family="paragraph">
      <style:paragraph-properties fo:text-align="center" fo:margin-top="0cm" fo:margin-bottom="0cm"/>
      <style:text-properties fo:font-family="DFKai-SB, BiauKai, Noto Serif CJK TC, Noto Sans CJK TC, serif" fo:font-size="10pt" fo:font-weight="bold"/>
    </style:style>
    <style:style style:name="PTableBody" style:family="paragraph">
      <style:paragraph-properties fo:margin-top="0cm" fo:margin-bottom="0cm"/>
      <style:text-properties fo:font-family="DFKai-SB, BiauKai, Noto Serif CJK TC, Noto Sans CJK TC, serif" fo:font-size="10pt"/>
    </style:style>
    <style:style style:name="PNote" style:family="paragraph">
      <style:paragraph-properties fo:margin-top="0.08cm" fo:margin-bottom="0.08cm"/>
      <style:text-properties fo:font-family="DFKai-SB, BiauKai, Noto Serif CJK TC, Noto Sans CJK TC, serif" fo:font-size="9pt"/>
    </style:style>
    <text:list-style style:name="ListDefault">
      <text:list-level-style-bullet text:level="1" text:bullet-char="•">
        <style:list-level-properties text:space-before="0.5cm" text:min-label-width="0.35cm"/>
      </text:list-level-style-bullet>
    </text:list-style>
    <style:style style:name="TableBase" style:family="table">
      <style:table-properties table:border-model="collapsing"/>
    </style:style>
    <style:style style:name="CoWide" style:family="table-column">
      <style:table-column-properties style:column-width="4.8cm"/>
    </style:style>
    <style:style style:name="CoMedium" style:family="table-column">
      <style:table-column-properties style:column-width="3.3cm"/>
    </style:style>
    <style:style style:name="CoNarrow" style:family="table-column">
      <style:table-column-properties style:column-width="2.6cm"/>
    </style:style>
    <style:style style:name="CellLabel" style:family="table-cell">
      <style:table-cell-properties fo:border="0.03cm solid #333333" fo:padding="0.08cm" fo:background-color="#efefef"/>
    </style:style>
    <style:style style:name="CellValue" style:family="table-cell">
      <style:table-cell-properties fo:border="0.03cm solid #333333" fo:padding="0.08cm"/>
    </style:style>
    <style:style style:name="CellHeader" style:family="table-cell">
      <style:table-cell-properties fo:border="0.03cm solid #333333" fo:padding="0.08cm" fo:background-color="#d9d9d9"/>
    </style:style>
    <style:style style:name="CellBody" style:family="table-cell">
      <style:table-cell-properties fo:border="0.03cm solid #333333" fo:padding="0.08cm"/>
    </style:style>
  </office:automatic-styles>
  <office:body>
    <office:text>
      <text:h text:style-name="PTitle" text:outline-level="1">臺北市立大學　社團活動申請表</text:h>
      <text:p text:style-name="PNote">請於活動二週前完成申請並隨表附活動企畫書</text:p>
      <text:p text:style-name="PNote">申請校內場地，請增附場地申請表</text:p>
      <text:h text:style-name="PSection" text:outline-level="2">申請基本資料</text:h>
      <table:table table:name="申請基本資料" table:style-name="TableBase">
        <table:table-column table:style-name="CoMedium"/>
        <table:table-column table:style-name="CoMedium"/>
        <table:table-column table:style-name="CoMedium"/>
        <table:table-column table:style-name="CoMedium"/>
        <table:table-row>
          <table:table-cell table:style-name="CellLabel" office:value-type="string">
            <text:p text:style-name="PLabel">活動名稱</text:p>
          </table:table-cell>
          <table:table-cell table:style-name="CellValue" office:value-type="string">
            <text:p text:style-name="PBody">{{activity_name}}</text:p>
          </table:table-cell>
          <table:table-cell table:style-name="CellLabel" office:value-type="string">
            <text:p text:style-name="PLabel">活動時間，起</text:p>
          </table:table-cell>
          <table:table-cell table:style-name="CellValue" office:value-type="string">
            <text:p text:style-name="PBody">{{start_year}} 年 {{start_month}} 月 {{start_day}} 日 {{start_hour}} 時 {{start_minute}} 分</text:p>
          </table:table-cell>
        </table:table-row>
        <table:table-row>
          <table:table-cell table:style-name="CellLabel" office:value-type="string">
            <text:p text:style-name="PLabel">活動時間，止</text:p>
          </table:table-cell>
          <table:table-cell table:style-name="CellValue" office:value-type="string">
            <text:p text:style-name="PBody">{{end_year}} 年 {{end_month}} 月 {{end_day}} 日 {{end_hour}} 時 {{end_minute}} 分</text:p>
          </table:table-cell>
          <table:table-cell table:style-name="CellLabel" office:value-type="string">
            <text:p text:style-name="PLabel">活動地點</text:p>
          </table:table-cell>
          <table:table-cell table:style-name="CellValue" office:value-type="string">
            <text:p text:style-name="PBody">{{location}}</text:p>
          </table:table-cell>
        </table:table-row>
        <table:table-row>
          <table:table-cell table:style-name="CellLabel" office:value-type="string">
            <text:p text:style-name="PLabel">申請日期</text:p>
          </table:table-cell>
          <table:table-cell table:style-name="CellValue" office:value-type="string">
            <text:p text:style-name="PBody">{{apply_year}} 年 {{apply_month}} 月 {{apply_day}} 日</text:p>
          </table:table-cell>
          <table:table-cell table:style-name="CellLabel" office:value-type="string">
            <text:p text:style-name="PLabel">主辦社團</text:p>
          </table:table-cell>
          <table:table-cell table:style-name="CellValue" office:value-type="string">
            <text:p text:style-name="PBody">{{club_name}}</text:p>
          </table:table-cell>
        </table:table-row>
        <table:table-row>
          <table:table-cell table:style-name="CellLabel" office:value-type="string">
            <text:p text:style-name="PLabel">參加人數</text:p>
          </table:table-cell>
          <table:table-cell table:style-name="CellValue" office:value-type="string">
            <text:p text:style-name="PBody">{{participant_count}} 人</text:p>
          </table:table-cell>
          <table:table-cell table:style-name="CellLabel" office:value-type="string">
            <text:p text:style-name="PLabel">社長</text:p>
          </table:table-cell>
          <table:table-cell table:style-name="CellValue" office:value-type="string">
            <text:p text:style-name="PBody">{{president_name}}</text:p>
          </table:table-cell>
        </table:table-row>
        <table:table-row>
          <table:table-cell table:style-name="CellLabel" office:value-type="string">
            <text:p text:style-name="PLabel">社長電話</text:p>
          </table:table-cell>
          <table:table-cell table:style-name="CellValue" office:value-type="string">
            <text:p text:style-name="PBody">{{president_phone}}</text:p>
          </table:table-cell>
          <table:table-cell table:style-name="CellLabel" office:value-type="string">
            <text:p text:style-name="PLabel">社團指導老師</text:p>
          </table:table-cell>
          <table:table-cell table:style-name="CellValue" office:value-type="string">
            <text:p text:style-name="PBody">{{advisor_name}}</text:p>
          </table:table-cell>
        </table:table-row>
        <table:table-row>
          <table:table-cell table:style-name="CellLabel" office:value-type="string">
            <text:p text:style-name="PLabel">指導老師電話</text:p>
          </table:table-cell>
          <table:table-cell table:style-name="CellValue" office:value-type="string">
            <text:p text:style-name="PBody">{{advisor_phone}}</text:p>
          </table:table-cell>
          <table:table-cell table:style-name="CellLabel" office:value-type="string">
            <text:p text:style-name="PLabel"/>
          </table:table-cell>
          <table:table-cell table:style-name="CellValue" office:value-type="string">
            <text:p text:style-name="PBody"/>
          </table:table-cell>
        </table:table-row>
      </table:table>
      <text:h text:style-name="PSection" text:outline-level="2">前年社團評鑑</text:h>
      <text:p text:style-name="PBody">前年社團評鑑：特優□　優等□　甲等□　乙等□</text:p>
      <text:h text:style-name="PSection" text:outline-level="2">活動性質</text:h>
      <text:p text:style-name="PBody">□ 幹訓或營隊：具學習目的者。</text:p>
      <text:p text:style-name="PBody">□ 學術活動：講演、大型學術、研討座談、展覽、比賽、研習、成果展等。</text:p>
      <text:p text:style-name="PBody">□ 刊物出版：週刊、月刊、校刊。</text:p>
      <text:p text:style-name="PBody">□ 康樂活動：校內外演奏會、出國演出、參加或主辦校際性比賽。</text:p>
      <text:p text:style-name="PBody">□ 社會服務活動：含平時與寒暑假期間。</text:p>
      <text:p text:style-name="PBody">□ 發展社團特色活動。</text:p>
      <text:p text:style-name="PBody">□ 其他符合社團宗旨之綜合性活動。</text:p>
      <text:p text:style-name="PBody">□ 學校委辦或代表學校之活動</text:p>
      <text:h text:style-name="PSection" text:outline-level="2">宗旨與活動內容區</text:h>
      <text:p text:style-name="PBody">宗旨：{{purpose_summary}}</text:p>
      <text:p text:style-name="PBody">活動內容或講題：{{content_summary}}</text:p>
      <text:h text:style-name="PSection" text:outline-level="2">申請人與經費區</text:h>
      <table:table table:name="申請人與經費區" table:style-name="TableBase">
        <table:table-column table:style-name="CoMedium"/>
        <table:table-column table:style-name="CoMedium"/>
        <table:table-column table:style-name="CoMedium"/>
        <table:table-column table:style-name="CoMedium"/>
        <table:table-row>
          <table:table-cell table:style-name="CellLabel" office:value-type="string">
            <text:p text:style-name="PLabel">活動申請人</text:p>
          </table:table-cell>
          <table:table-cell table:style-name="CellValue" office:value-type="string">
            <text:p text:style-name="PBody">{{applicant_name}}</text:p>
          </table:table-cell>
          <table:table-cell table:style-name="CellLabel" office:value-type="string">
            <text:p text:style-name="PLabel">系別</text:p>
          </table:table-cell>
          <table:table-cell table:style-name="CellValue" office:value-type="string">
            <text:p text:style-name="PBody">{{applicant_department}}</text:p>
          </table:table-cell>
        </table:table-row>
        <table:table-row>
          <table:table-cell table:style-name="CellLabel" office:value-type="string">
            <text:p text:style-name="PLabel">班別</text:p>
          </table:table-cell>
          <table:table-cell table:style-name="CellValue" office:value-type="string">
            <text:p text:style-name="PBody">{{applicant_class}}</text:p>
          </table:table-cell>
          <table:table-cell table:style-name="CellLabel" office:value-type="string">
            <text:p text:style-name="PLabel">手機</text:p>
          </table:table-cell>
          <table:table-cell table:style-name="CellValue" office:value-type="string">
            <text:p text:style-name="PBody">{{applicant_phone}}</text:p>
          </table:table-cell>
        </table:table-row>
        <table:table-row>
          <table:table-cell table:style-name="CellLabel" office:value-type="string">
            <text:p text:style-name="PLabel">活動費申請補助</text:p>
          </table:table-cell>
          <table:table-cell table:style-name="CellValue" office:value-type="string">
            <text:p text:style-name="PBody">{{subsidy_amount}} 元</text:p>
          </table:table-cell>
          <table:table-cell table:style-name="CellLabel" office:value-type="string">
            <text:p text:style-name="PLabel">活動費自籌經費</text:p>
          </table:table-cell>
          <table:table-cell table:style-name="CellValue" office:value-type="string">
            <text:p text:style-name="PBody">{{self_funded_amount}} 元</text:p>
          </table:table-cell>
        </table:table-row>
        <table:table-row>
          <table:table-cell table:style-name="CellLabel" office:value-type="string">
            <text:p text:style-name="PLabel">合計</text:p>
          </table:table-cell>
          <table:table-cell table:style-name="CellValue" office:value-type="string">
            <text:p text:style-name="PBody">{{total_amount}} 元</text:p>
          </table:table-cell>
          <table:table-cell table:style-name="CellLabel" office:value-type="string">
            <text:p text:style-name="PLabel"/>
          </table:table-cell>
          <table:table-cell table:style-name="CellValue" office:value-type="string">
            <text:p text:style-name="PBody"/>
          </table:table-cell>
        </table:table-row>
      </table:table>
      <text:h text:style-name="PSection" text:outline-level="2">行政簽核保留區</text:h>
      <table:table table:name="行政簽核保留區" table:style-name="TableBase">
        <table:table-column table:style-name="CoNarrow"/>
        <table:table-column table:style-name="CoNarrow"/>
        <table:table-column table:style-name="CoNarrow"/>
        <table:table-column table:style-name="CoNarrow"/>
        <table:table-column table:style-name="CoNarrow"/>
        <table:table-column table:style-name="CoNarrow"/>
        <table:table-row>
          <table:table-cell table:style-name="CellLabel" office:value-type="string">
            <text:p text:style-name="PLabel">本次使用種類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一般補助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專案補助</text:p>
          </table:table-cell>
          <table:table-cell table:style-name="CellValue" office:value-type="string">
            <text:p text:style-name="PBody"/>
          </table:table-cell>
        </table:table-row>
        <table:table-row>
          <table:table-cell table:style-name="CellLabel" office:value-type="string">
            <text:p text:style-name="PLabel">額度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已使用額度，含本次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尚餘額度</text:p>
          </table:table-cell>
          <table:table-cell table:style-name="CellValue" office:value-type="string">
            <text:p text:style-name="PBody"/>
          </table:table-cell>
        </table:table-row>
        <table:table-row>
          <table:table-cell table:style-name="CellLabel" office:value-type="string">
            <text:p text:style-name="PLabel">承辦人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單位主管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組長</text:p>
          </table:table-cell>
          <table:table-cell table:style-name="CellValue" office:value-type="string">
            <text:p text:style-name="PBody"/>
          </table:table-cell>
        </table:table-row>
        <table:table-row>
          <table:table-cell table:style-name="CellLabel" office:value-type="string">
            <text:p text:style-name="PLabel">學務長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會辦單位：總務處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會辦單位：會計室</text:p>
          </table:table-cell>
          <table:table-cell table:style-name="CellValue" office:value-type="string">
            <text:p text:style-name="PBody"/>
          </table:table-cell>
        </table:table-row>
        <table:table-row>
          <table:table-cell table:style-name="CellLabel" office:value-type="string">
            <text:p text:style-name="PLabel">校長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/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/>
          </table:table-cell>
          <table:table-cell table:style-name="CellValue" office:value-type="string">
            <text:p text:style-name="PBody"/>
          </table:table-cell>
        </table:table-row>
      </table:table>
      <text:p text:style-name="PNote">使用種類與額度由課外活動組填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FormalCJK" svg:font-family="DFKai-SB, BiauKai, Noto Serif CJK TC, Noto Sans CJK TC, serif"/>
  </office:font-face-decls>
  <office:styles>
    <style:default-style style:family="paragraph">
      <style:text-properties style:font-name="FormalCJK" fo:font-family="DFKai-SB, BiauKai, Noto Serif CJK TC, Noto Sans CJK TC, serif" fo:font-size="12pt"/>
    </style:default-style>
    <style:style style:name="Footer" style:family="paragraph">
      <style:paragraph-properties fo:text-align="center"/>
      <style:text-properties style:font-name="FormalCJK" fo:font-family="DFKai-SB, BiauKai, Noto Serif CJK TC, Noto Sans CJK TC, serif" fo:font-size="9pt"/>
    </style:style>
  </office:styles>
  <office:automatic-styles>
    <style:page-layout style:name="pm1">
      <style:page-layout-properties fo:page-width="29.7cm" fo:page-height="21cm" style:print-orientation="landscape" fo:margin-top="0.9cm" fo:margin-bottom="0.9cm" fo:margin-left="0.9cm" fo:margin-right="0.9cm"/>
    </style:page-layout>
  </office:automatic-styles>
  <office:master-styles>
    <style:master-page style:name="Standard" style:page-layout-name="pm1">
      <style:footer>
        <text:p text:style-name="Footer">第<text:page-number text:select-page="current">1</text:page-number>頁　共<text:page-count>1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