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xmlns:of="urn:oasis:names:tc:opendocument:xmlns:of:1.2" office:version="1.2">
  <office:scripts/>
  <office:automatic-styles>
    <style:style style:name="Co1" style:family="table-column">
      <style:table-column-properties style:column-width="1.1cm"/>
    </style:style>
    <style:style style:name="Co2" style:family="table-column">
      <style:table-column-properties style:column-width="2.2cm"/>
    </style:style>
    <style:style style:name="Co3" style:family="table-column">
      <style:table-column-properties style:column-width="3.1cm"/>
    </style:style>
    <style:style style:name="Co4" style:family="table-column">
      <style:table-column-properties style:column-width="3.3cm"/>
    </style:style>
    <style:style style:name="Co5" style:family="table-column">
      <style:table-column-properties style:column-width="3.3cm"/>
    </style:style>
    <style:style style:name="Co6" style:family="table-column">
      <style:table-column-properties style:column-width="2.9cm"/>
    </style:style>
    <style:style style:name="Co7" style:family="table-column">
      <style:table-column-properties style:column-width="2.4cm"/>
    </style:style>
    <style:style style:name="Co8" style:family="table-column">
      <style:table-column-properties style:column-width="2.6cm"/>
    </style:style>
    <style:style style:name="Co9" style:family="table-column">
      <style:table-column-properties style:column-width="2.3cm"/>
    </style:style>
    <style:style style:name="Co10" style:family="table-column">
      <style:table-column-properties style:column-width="2.6cm"/>
    </style:style>
    <style:style style:name="Co11" style:family="table-column">
      <style:table-column-properties style:column-width="2.2cm"/>
    </style:style>
    <style:style style:name="Co12" style:family="table-column">
      <style:table-column-properties style:column-width="2.4cm"/>
    </style:style>
    <style:style style:name="Co13" style:family="table-column">
      <style:table-column-properties style:column-width="3.2cm"/>
    </style:style>
    <style:style style:name="Co14" style:family="table-column">
      <style:table-column-properties style:column-width="2.8cm"/>
    </style:style>
    <number:number-style style:name="NNumber">
      <number:number number:min-integer-digits="1" number:decimal-places="0"/>
    </number:number-style>
    <number:number-style style:name="NAmount">
      <number:number number:min-integer-digits="1" number:decimal-places="0" number:grouping="true"/>
    </number:number-style>
    <number:percentage-style style:name="NPercent">
      <number:number number:min-integer-digits="1" number:decimal-places="2"/>
      <number:text>%</number:text>
    </number:percentage-style>
    <number:date-style style:name="NDate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RowDefault" style:family="table-row">
      <style:table-row-properties style:row-height="0.72cm"/>
    </style:style>
    <style:style style:name="RowTitle" style:family="table-row">
      <style:table-row-properties style:row-height="0.95cm"/>
    </style:style>
    <style:style style:name="RowHeader" style:family="table-row">
      <style:table-row-properties style:row-height="0.82cm"/>
    </style:style>
    <style:style style:name="RowSummary" style:family="table-row">
      <style:table-row-properties style:row-height="0.75cm"/>
    </style:style>
    <style:style style:name="PTitle" style:family="paragraph">
      <style:paragraph-properties fo:text-align="center"/>
      <style:text-properties fo:font-family="DFKai-SB, BiauKai, Noto Serif CJK TC, Noto Sans CJK TC, serif" fo:font-size="15pt" fo:font-weight="bold"/>
    </style:style>
    <style:style style:name="PHeader" style:family="paragraph">
      <style:paragraph-properties fo:text-align="center"/>
      <style:text-properties fo:font-family="DFKai-SB, BiauKai, Noto Serif CJK TC, Noto Sans CJK TC, serif" fo:font-size="11pt" fo:font-weight="bold"/>
    </style:style>
    <style:style style:name="PLabel" style:family="paragraph">
      <style:text-properties fo:font-family="DFKai-SB, BiauKai, Noto Serif CJK TC, Noto Sans CJK TC, serif" fo:font-size="12pt" fo:font-weight="bold"/>
    </style:style>
    <style:style style:name="PBody" style:family="paragraph">
      <style:text-properties fo:font-family="DFKai-SB, BiauKai, Noto Serif CJK TC, Noto Sans CJK TC, serif" fo:font-size="11pt"/>
    </style:style>
    <style:style style:name="PSmall" style:family="paragraph">
      <style:text-properties fo:font-family="DFKai-SB, BiauKai, Noto Serif CJK TC, Noto Sans CJK TC, serif" fo:font-size="9pt"/>
    </style:style>
    <style:style style:name="CellTitle" style:family="table-cell">
      <style:table-cell-properties fo:border="0.03cm solid #4b5563" fo:padding="0.16cm" fo:background-color="#f8fafc"/>
    </style:style>
    <style:style style:name="CellLabel" style:family="table-cell">
      <style:table-cell-properties fo:border="0.03cm solid #6b7280" fo:padding="0.12cm" fo:background-color="#eef2ff"/>
    </style:style>
    <style:style style:name="CellValue" style:family="table-cell">
      <style:table-cell-properties fo:border="0.03cm solid #9ca3af" fo:padding="0.12cm"/>
    </style:style>
    <style:style style:name="CellDate" style:family="table-cell" style:data-style-name="NDate">
      <style:table-cell-properties fo:border="0.03cm solid #9ca3af" fo:padding="0.12cm"/>
    </style:style>
    <style:style style:name="CellHeader" style:family="table-cell">
      <style:table-cell-properties fo:border="0.03cm solid #374151" fo:padding="0.1cm" fo:background-color="#dbeafe"/>
    </style:style>
    <style:style style:name="CellBody" style:family="table-cell">
      <style:table-cell-properties fo:border="0.03cm solid #cbd5e1" fo:padding="0.09cm"/>
    </style:style>
    <style:style style:name="CellNumber" style:family="table-cell" style:data-style-name="NNumber">
      <style:table-cell-properties fo:border="0.03cm solid #cbd5e1" fo:padding="0.09cm"/>
    </style:style>
    <style:style style:name="CellMoney" style:family="table-cell" style:data-style-name="NAmount">
      <style:table-cell-properties fo:border="0.03cm solid #cbd5e1" fo:padding="0.09cm"/>
    </style:style>
    <style:style style:name="CellMoneyFormula" style:family="table-cell" style:data-style-name="NAmount">
      <style:table-cell-properties fo:border="0.03cm solid #94a3b8" fo:padding="0.09cm" fo:background-color="#f8fafc"/>
    </style:style>
    <style:style style:name="CellSummaryHeader" style:family="table-cell">
      <style:table-cell-properties fo:border="0.03cm solid #4b5563" fo:padding="0.1cm" fo:background-color="#e5e7eb"/>
    </style:style>
    <style:style style:name="CellSummaryText" style:family="table-cell">
      <style:table-cell-properties fo:border="0.03cm solid #cbd5e1" fo:padding="0.09cm"/>
    </style:style>
    <style:style style:name="CellSummaryMoney" style:family="table-cell" style:data-style-name="NAmount">
      <style:table-cell-properties fo:border="0.03cm solid #cbd5e1" fo:padding="0.09cm"/>
    </style:style>
    <style:style style:name="CellSummaryFormula" style:family="table-cell" style:data-style-name="NAmount">
      <style:table-cell-properties fo:border="0.03cm solid #cbd5e1" fo:padding="0.09cm" fo:background-color="#f8fafc"/>
    </style:style>
    <style:style style:name="CellSummaryPercent" style:family="table-cell" style:data-style-name="NPercent">
      <style:table-cell-properties fo:border="0.03cm solid #cbd5e1" fo:padding="0.09cm" fo:background-color="#f8fafc"/>
    </style:style>
    <style:style style:name="CellBlank" style:family="table-cell">
      <style:table-cell-properties fo:border="none" fo:padding="0.08cm"/>
    </style:style>
  </office:automatic-styles>
  <office:body>
    <office:spreadsheet>
      <table:content-validations>
        <table:content-validation table:name="validation_receipt_type" table:allow-empty-cell="true" table:display-list="unsorted" table:condition="of:cell-content-is-in-list(&quot;發票&quot;;&quot;電子發票證明聯&quot;;&quot;收據&quot;;&quot;免用統一發票收據&quot;;&quot;匯款證明&quot;;&quot;付款截圖&quot;;&quot;領據&quot;;&quot;其他&quot;)">
          <table:error-message table:display="true" table:message-type="stop">
            <text:p text:style-name="PSmall">請從單據類型清單選擇。</text:p>
          </table:error-message>
        </table:content-validation>
        <table:content-validation table:name="validation_funding_source" table:allow-empty-cell="true" table:display-list="unsorted" table:condition="of:cell-content-is-in-list(&quot;學校補助&quot;;&quot;校外補助&quot;;&quot;社團會費&quot;;&quot;自籌&quot;;&quot;其他&quot;)">
          <table:error-message table:display="true" table:message-type="stop">
            <text:p text:style-name="PSmall">請從經費來源清單選擇。</text:p>
          </table:error-message>
        </table:content-validation>
        <table:content-validation table:name="validation_payment_method" table:allow-empty-cell="true" table:display-list="unsorted" table:condition="of:cell-content-is-in-list(&quot;現金&quot;;&quot;轉帳&quot;;&quot;信用卡&quot;;&quot;金融卡&quot;;&quot;行動支付&quot;;&quot;匯款&quot;;&quot;其他&quot;)">
          <table:error-message table:display="true" table:message-type="stop">
            <text:p text:style-name="PSmall">請從支付方式清單選擇。</text:p>
          </table:error-message>
        </table:content-validation>
        <table:content-validation table:name="validation_receipt_status" table:allow-empty-cell="true" table:display-list="unsorted" table:condition="of:cell-content-is-in-list(&quot;已附&quot;;&quot;待補&quot;;&quot;遺失&quot;;&quot;不核銷&quot;;&quot;不適用&quot;)">
          <table:error-message table:display="true" table:message-type="stop">
            <text:p text:style-name="PSmall">請從憑證狀態清單選擇。</text:p>
          </table:error-message>
        </table:content-validation>
      </table:content-validations>
      <table:table table:name="核銷明細表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column table:style-name="Co14"/>
        <table:table-row table:style-name="RowTitle">
          <table:table-cell table:style-name="CellBlank" office:value-type="string" table:number-columns-spanned="14">
            <text:p text:style-name="PTitle">臺北市立大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Title">
          <table:table-cell table:style-name="CellBlank" office:value-type="string" table:number-columns-spanned="14">
            <text:p text:style-name="PTitle">社團活動核銷明細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活動名稱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日期</text:p>
          </table:table-cell>
          <table:table-cell table:style-name="CellDat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主辦社團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負責人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財務負責人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製表日期</text:p>
          </table:table-cell>
          <table:table-cell table:style-name="CellDate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序號</text:p>
          </table:table-cell>
          <table:table-cell table:style-name="CellHeader" office:value-type="string">
            <text:p text:style-name="PHeader">支出日期</text:p>
          </table:table-cell>
          <table:table-cell table:style-name="CellHeader" office:value-type="string">
            <text:p text:style-name="PHeader">對應經費項目</text:p>
          </table:table-cell>
          <table:table-cell table:style-name="CellHeader" office:value-type="string">
            <text:p text:style-name="PHeader">品名／用途</text:p>
          </table:table-cell>
          <table:table-cell table:style-name="CellHeader" office:value-type="string">
            <text:p text:style-name="PHeader">店家／受款單位</text:p>
          </table:table-cell>
          <table:table-cell table:style-name="CellHeader" office:value-type="string">
            <text:p text:style-name="PHeader">單據類型</text:p>
          </table:table-cell>
          <table:table-cell table:style-name="CellHeader" office:value-type="string">
            <text:p text:style-name="PHeader">單據號碼</text:p>
          </table:table-cell>
          <table:table-cell table:style-name="CellHeader" office:value-type="string">
            <text:p text:style-name="PHeader">經費來源</text:p>
          </table:table-cell>
          <table:table-cell table:style-name="CellHeader" office:value-type="string">
            <text:p text:style-name="PHeader">支付方式</text:p>
          </table:table-cell>
          <table:table-cell table:style-name="CellHeader" office:value-type="string">
            <text:p text:style-name="PHeader">墊付款人</text:p>
          </table:table-cell>
          <table:table-cell table:style-name="CellHeader" office:value-type="string">
            <text:p text:style-name="PHeader">金額</text:p>
          </table:table-cell>
          <table:table-cell table:style-name="CellHeader" office:value-type="string">
            <text:p text:style-name="PHeader">憑證狀態</text:p>
          </table:table-cell>
          <table:table-cell table:style-name="CellHeader" office:value-type="string">
            <text:p text:style-name="PHeader">附件檔名／連結</text:p>
          </table:table-cell>
          <table:table-cell table:style-name="CellHeader" office:value-type="string">
            <text:p text:style-name="PHeader">備註</text:p>
          </table:table-cell>
        </table:table-row>
        <table:table-row table:style-name="RowDefault">
          <table:table-cell table:style-name="CellBody" office:value-type="float" office:value="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receipt_type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funding_source">
            <text:p text:style-name="PBody"/>
          </table:table-cell>
          <table:table-cell table:style-name="CellBody" office:value-type="string" table:content-validation-name="validation_payment_method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receip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14">
            <text:p text:style-name="PHeader">統計摘要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>
            <text:p text:style-name="PLabel">支出總金額</text:p>
          </table:table-cell>
          <table:table-cell table:style-name="CellSummaryFormula" office:value-type="float" office:value="0" table:formula="=SUM([.K8:.K107])">
            <text:p text:style-name="PBody"/>
          </table:table-cell>
          <table:table-cell table:style-name="CellSummaryText" office:value-type="string">
            <text:p text:style-name="PLabel">學校補助支出總金額</text:p>
          </table:table-cell>
          <table:table-cell table:style-name="CellSummaryFormula" office:value-type="float" office:value="0" table:formula="=SUMIF([.H8:.H107];&quot;學校補助&quot;;[.K8:.K107])">
            <text:p text:style-name="PBody"/>
          </table:table-cell>
          <table:table-cell table:style-name="CellSummaryText" office:value-type="string">
            <text:p text:style-name="PLabel">校外補助支出總金額</text:p>
          </table:table-cell>
          <table:table-cell table:style-name="CellSummaryFormula" office:value-type="float" office:value="0" table:formula="=SUMIF([.H8:.H107];&quot;校外補助&quot;;[.K8:.K107])">
            <text:p text:style-name="PBody"/>
          </table:table-cell>
          <table:table-cell table:style-name="CellSummaryText" office:value-type="string">
            <text:p text:style-name="PLabel">社團會費支出總金額</text:p>
          </table:table-cell>
          <table:table-cell table:style-name="CellSummaryFormula" office:value-type="float" office:value="0" table:formula="=SUMIF([.H8:.H107];&quot;社團會費&quot;;[.K8:.K107])">
            <text:p text:style-name="PBody"/>
          </table:table-cell>
          <table:table-cell table:style-name="CellSummaryText" office:value-type="string">
            <text:p text:style-name="PLabel">自籌支出總金額</text:p>
          </table:table-cell>
          <table:table-cell table:style-name="CellSummaryFormula" office:value-type="float" office:value="0" table:formula="=SUMIF([.H8:.H107];&quot;自籌&quot;;[.K8:.K107])">
            <text:p text:style-name="PBody"/>
          </table:table-cell>
          <table:table-cell table:style-name="CellSummaryText" office:value-type="string">
            <text:p text:style-name="PLabel">其他支出總金額</text:p>
          </table:table-cell>
          <table:table-cell table:style-name="CellSummaryFormula" office:value-type="float" office:value="0" table:formula="=SUMIF([.H8:.H107];&quot;其他&quot;;[.K8:.K107])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Label">已附憑證筆數</text:p>
          </table:table-cell>
          <table:table-cell table:style-name="CellSummaryFormula" office:value-type="float" office:value="0" table:formula="=COUNTIF([.L8:.L107];&quot;已附&quot;)">
            <text:p text:style-name="PBody"/>
          </table:table-cell>
          <table:table-cell table:style-name="CellSummaryText" office:value-type="string">
            <text:p text:style-name="PLabel">待補憑證筆數</text:p>
          </table:table-cell>
          <table:table-cell table:style-name="CellSummaryFormula" office:value-type="float" office:value="0" table:formula="=COUNTIF([.L8:.L107];&quot;待補&quot;)">
            <text:p text:style-name="PBody"/>
          </table:table-cell>
          <table:table-cell table:style-name="CellSummaryText" office:value-type="string">
            <text:p text:style-name="PLabel">遺失憑證筆數</text:p>
          </table:table-cell>
          <table:table-cell table:style-name="CellSummaryFormula" office:value-type="float" office:value="0" table:formula="=COUNTIF([.L8:.L107];&quot;遺失&quot;)">
            <text:p text:style-name="PBody"/>
          </table:table-cell>
          <table:table-cell table:style-name="CellSummaryText" office:value-type="string">
            <text:p text:style-name="PLabel">不核銷筆數</text:p>
          </table:table-cell>
          <table:table-cell table:style-name="CellSummaryFormula" office:value-type="float" office:value="0" table:formula="=COUNTIF([.L8:.L107];&quot;不核銷&quot;)">
            <text:p text:style-name="PBody"/>
          </table:table-cell>
          <table:table-cell table:style-name="CellSummaryText" office:value-type="string">
            <text:p text:style-name="PLabel">單據張數合計</text:p>
          </table:table-cell>
          <table:table-cell table:style-name="CellSummaryFormula" office:value-type="float" office:value="0" table:formula="=SUMPRODUCT(N(LEN([.G8:.G107])&gt;0))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14">
            <text:p text:style-name="PHeader">備註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14">
            <text:p text:style-name="PBody">可在此補充單據遺失、補件進度、付款差異或附件說明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fo:font-family="DFKai-SB, BiauKai, Noto Serif CJK TC, Noto Sans CJK TC, serif" fo:font-size="12pt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