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office:version="1.2">
  <office:scripts/>
  <office:automatic-styles>
    <style:style style:name="PBody" style:family="paragraph">
      <style:paragraph-properties fo:margin-top="0cm" fo:margin-bottom="0.14cm" fo:line-height="130%"/>
      <style:text-properties fo:font-family="DFKai-SB, BiauKai, Noto Serif CJK TC, Noto Sans CJK TC, serif" fo:font-size="12pt"/>
    </style:style>
    <style:style style:name="PTitle" style:family="paragraph">
      <style:paragraph-properties fo:text-align="center" fo:margin-top="0cm" fo:margin-bottom="0.35cm"/>
      <style:text-properties fo:font-family="DFKai-SB, BiauKai, Noto Serif CJK TC, Noto Sans CJK TC, serif" fo:font-size="18pt" fo:font-weight="bold"/>
    </style:style>
    <style:style style:name="PSection" style:family="paragraph">
      <style:paragraph-properties fo:margin-top="0.28cm" fo:margin-bottom="0.14cm"/>
      <style:text-properties fo:font-family="DFKai-SB, BiauKai, Noto Serif CJK TC, Noto Sans CJK TC, serif" fo:font-size="14pt" fo:font-weight="bold"/>
    </style:style>
    <style:style style:name="PLabel" style:family="paragraph">
      <style:paragraph-properties fo:margin-top="0cm" fo:margin-bottom="0cm"/>
      <style:text-properties fo:font-family="DFKai-SB, BiauKai, Noto Serif CJK TC, Noto Sans CJK TC, serif" fo:font-size="11pt" fo:font-weight="bold"/>
    </style:style>
    <style:style style:name="PTableHeader" style:family="paragraph">
      <style:paragraph-properties fo:text-align="center" fo:margin-top="0cm" fo:margin-bottom="0cm"/>
      <style:text-properties fo:font-family="DFKai-SB, BiauKai, Noto Serif CJK TC, Noto Sans CJK TC, serif" fo:font-size="11pt" fo:font-weight="bold"/>
    </style:style>
    <style:style style:name="PTableBody" style:family="paragraph">
      <style:paragraph-properties fo:margin-top="0cm" fo:margin-bottom="0cm"/>
      <style:text-properties fo:font-family="DFKai-SB, BiauKai, Noto Serif CJK TC, Noto Sans CJK TC, serif" fo:font-size="11pt"/>
    </style:style>
    <style:style style:name="PNote" style:family="paragraph">
      <style:paragraph-properties fo:margin-top="0.08cm" fo:margin-bottom="0.08cm"/>
      <style:text-properties fo:font-family="DFKai-SB, BiauKai, Noto Serif CJK TC, Noto Sans CJK TC, serif" fo:font-size="10pt"/>
    </style:style>
    <text:list-style style:name="ListDefault">
      <text:list-level-style-bullet text:level="1" text:bullet-char="•">
        <style:list-level-properties text:space-before="0.5cm" text:min-label-width="0.35cm"/>
      </text:list-level-style-bullet>
    </text:list-style>
    <style:style style:name="TableBase" style:family="table">
      <style:table-properties table:border-model="collapsing"/>
    </style:style>
    <style:style style:name="CoWide" style:family="table-column">
      <style:table-column-properties style:column-width="4.8cm"/>
    </style:style>
    <style:style style:name="CoMedium" style:family="table-column">
      <style:table-column-properties style:column-width="3.3cm"/>
    </style:style>
    <style:style style:name="CoNarrow" style:family="table-column">
      <style:table-column-properties style:column-width="2.6cm"/>
    </style:style>
    <style:style style:name="CellLabel" style:family="table-cell">
      <style:table-cell-properties fo:border="0.03cm solid #333333" fo:padding="0.08cm" fo:background-color="#efefef"/>
    </style:style>
    <style:style style:name="CellValue" style:family="table-cell">
      <style:table-cell-properties fo:border="0.03cm solid #333333" fo:padding="0.08cm"/>
    </style:style>
    <style:style style:name="CellHeader" style:family="table-cell">
      <style:table-cell-properties fo:border="0.03cm solid #333333" fo:padding="0.08cm" fo:background-color="#d9d9d9"/>
    </style:style>
    <style:style style:name="CellBody" style:family="table-cell">
      <style:table-cell-properties fo:border="0.03cm solid #333333" fo:padding="0.08cm"/>
    </style:style>
  </office:automatic-styles>
  <office:body>
    <office:text>
      <text:h text:style-name="PTitle" text:outline-level="1">臺北市立大學</text:h>
      <text:h text:style-name="PTitle" text:outline-level="1">社團活動成果報告</text:h>
      <text:h text:style-name="PSection" text:outline-level="2">一、會議記錄</text:h>
      <table:table table:name="一、會議記錄" table:style-name="TableBase">
        <table:table-column table:style-name="CoWide"/>
        <table:table-column table:style-name="CoWide"/>
        <table:table-row>
          <table:table-cell table:style-name="CellLabel" office:value-type="string">
            <text:p text:style-name="PLabel">會議性質</text:p>
          </table:table-cell>
          <table:table-cell table:style-name="CellValue" office:value-type="string">
            <text:p text:style-name="PBody">○籌備會議　○檢討會議　○其他</text:p>
          </table:table-cell>
        </table:table-row>
        <table:table-row>
          <table:table-cell table:style-name="CellLabel" office:value-type="string">
            <text:p text:style-name="PLabel">其他會議性質說明</text:p>
          </table:table-cell>
          <table:table-cell table:style-name="CellValue" office:value-type="string">
            <text:p text:style-name="PBody">＿＿＿＿＿＿＿＿＿＿</text:p>
          </table:table-cell>
        </table:table-row>
        <table:table-row>
          <table:table-cell table:style-name="CellLabel" office:value-type="string">
            <text:p text:style-name="PLabel">開會日期</text:p>
          </table:table-cell>
          <table:table-cell table:style-name="CellValue" office:value-type="string">
            <text:p text:style-name="PBody">＿＿＿＿＿＿＿＿＿＿</text:p>
          </table:table-cell>
        </table:table-row>
        <table:table-row>
          <table:table-cell table:style-name="CellLabel" office:value-type="string">
            <text:p text:style-name="PLabel">開會地點</text:p>
          </table:table-cell>
          <table:table-cell table:style-name="CellValue" office:value-type="string">
            <text:p text:style-name="PBody">＿＿＿＿＿＿＿＿＿＿</text:p>
          </table:table-cell>
        </table:table-row>
        <table:table-row>
          <table:table-cell table:style-name="CellLabel" office:value-type="string">
            <text:p text:style-name="PLabel">會議開始時間</text:p>
          </table:table-cell>
          <table:table-cell table:style-name="CellValue" office:value-type="string">
            <text:p text:style-name="PBody">＿＿＿＿＿＿＿＿＿＿</text:p>
          </table:table-cell>
        </table:table-row>
        <table:table-row>
          <table:table-cell table:style-name="CellLabel" office:value-type="string">
            <text:p text:style-name="PLabel">會議結束時間</text:p>
          </table:table-cell>
          <table:table-cell table:style-name="CellValue" office:value-type="string">
            <text:p text:style-name="PBody">＿＿＿＿＿＿＿＿＿＿</text:p>
          </table:table-cell>
        </table:table-row>
        <table:table-row>
          <table:table-cell table:style-name="CellLabel" office:value-type="string">
            <text:p text:style-name="PLabel">主席</text:p>
          </table:table-cell>
          <table:table-cell table:style-name="CellValue" office:value-type="string">
            <text:p text:style-name="PBody">＿＿＿＿＿＿＿＿＿＿</text:p>
          </table:table-cell>
        </table:table-row>
        <table:table-row>
          <table:table-cell table:style-name="CellLabel" office:value-type="string">
            <text:p text:style-name="PLabel">記錄</text:p>
          </table:table-cell>
          <table:table-cell table:style-name="CellValue" office:value-type="string">
            <text:p text:style-name="PBody">＿＿＿＿＿＿＿＿＿＿</text:p>
          </table:table-cell>
        </table:table-row>
        <table:table-row>
          <table:table-cell table:style-name="CellLabel" office:value-type="string">
            <text:p text:style-name="PLabel">出席人員</text:p>
          </table:table-cell>
          <table:table-cell table:style-name="CellValue" office:value-type="string">
            <text:p text:style-name="PBody">＿＿＿＿＿＿＿＿＿＿</text:p>
          </table:table-cell>
        </table:table-row>
      </table:table>
      <text:h text:style-name="PSection" text:outline-level="2">討論內容</text:h>
      <text:p text:style-name="PBody">＿＿＿＿＿＿＿＿＿＿</text:p>
      <text:p text:style-name="PBody">＿＿＿＿＿＿＿＿＿＿</text:p>
      <text:h text:style-name="PSection" text:outline-level="2">臨時動議</text:h>
      <text:p text:style-name="PBody">＿＿＿＿＿＿＿＿＿＿</text:p>
      <text:h text:style-name="PSection" text:outline-level="2">決議</text:h>
      <text:p text:style-name="PBody">＿＿＿＿＿＿＿＿＿＿</text:p>
      <text:h text:style-name="PSection" text:outline-level="2">二、活動簡介與記錄</text:h>
      <text:p text:style-name="PBody">＿＿＿＿＿＿＿＿＿＿</text:p>
      <text:p text:style-name="PBody">＿＿＿＿＿＿＿＿＿＿</text:p>
      <text:p text:style-name="PBody">＿＿＿＿＿＿＿＿＿＿</text:p>
      <text:h text:style-name="PSection" text:outline-level="2">三、工作人員列表</text:h>
      <table:table table:name="三、工作人員列表" table:style-name="TableBase">
        <table:table-column table:style-name="CoNarrow"/>
        <table:table-column table:style-name="CoNarrow"/>
        <table:table-column table:style-name="CoNarrow"/>
        <table:table-column table:style-name="CoNarrow"/>
        <table:table-column table:style-name="CoNarrow"/>
        <table:table-column table:style-name="CoNarrow"/>
        <table:table-row>
          <table:table-cell table:style-name="CellHeader" office:value-type="string">
            <text:p text:style-name="PTableHeader">工作職稱</text:p>
          </table:table-cell>
          <table:table-cell table:style-name="CellHeader" office:value-type="string">
            <text:p text:style-name="PTableHeader">學號</text:p>
          </table:table-cell>
          <table:table-cell table:style-name="CellHeader" office:value-type="string">
            <text:p text:style-name="PTableHeader">姓名</text:p>
          </table:table-cell>
          <table:table-cell table:style-name="CellHeader" office:value-type="string">
            <text:p text:style-name="PTableHeader">工作職稱</text:p>
          </table:table-cell>
          <table:table-cell table:style-name="CellHeader" office:value-type="string">
            <text:p text:style-name="PTableHeader">學號</text:p>
          </table:table-cell>
          <table:table-cell table:style-name="CellHeader" office:value-type="string">
            <text:p text:style-name="PTableHeader">姓名</text:p>
          </table:table-cell>
        </table:table-row>
        <table:table-row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</table:table-row>
        <table:table-row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</table:table-row>
        <table:table-row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</table:table-row>
        <table:table-row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</table:table-row>
      </table:table>
      <text:h text:style-name="PSection" text:outline-level="2">四、社員心得</text:h>
      <text:p text:style-name="PBody">＿＿＿＿＿＿＿＿＿＿</text:p>
      <text:p text:style-name="PBody">＿＿＿＿＿＿＿＿＿＿</text:p>
      <text:h text:style-name="PSection" text:outline-level="2">五、活動照片</text:h>
      <table:table table:name="五、活動照片" table:style-name="TableBase">
        <table:table-column table:style-name="CoWide"/>
        <table:table-column table:style-name="CoWide"/>
        <table:table-row>
          <table:table-cell table:style-name="CellHeader" office:value-type="string">
            <text:p text:style-name="PTableHeader">照片一／照片二</text:p>
          </table:table-cell>
          <table:table-cell table:style-name="CellHeader" office:value-type="string">
            <text:p text:style-name="PTableHeader">照片三／照片四</text:p>
          </table:table-cell>
        </table:table-row>
        <table:table-row>
          <table:table-cell table:style-name="CellBody" office:value-type="string">
            <text:p text:style-name="PTableBody">照片黏貼處</text:p>
            <text:p text:style-name="PTableBody"/>
            <text:p text:style-name="PTableBody"/>
            <text:p text:style-name="PTableBody"/>
            <text:p text:style-name="PTableBody">活動照片內容：</text:p>
          </table:table-cell>
          <table:table-cell table:style-name="CellBody" office:value-type="string">
            <text:p text:style-name="PTableBody">照片黏貼處</text:p>
            <text:p text:style-name="PTableBody"/>
            <text:p text:style-name="PTableBody"/>
            <text:p text:style-name="PTableBody"/>
            <text:p text:style-name="PTableBody">活動照片內容：</text:p>
          </table:table-cell>
        </table:table-row>
        <table:table-row>
          <table:table-cell table:style-name="CellBody" office:value-type="string">
            <text:p text:style-name="PTableBody">照片黏貼處</text:p>
            <text:p text:style-name="PTableBody"/>
            <text:p text:style-name="PTableBody"/>
            <text:p text:style-name="PTableBody"/>
            <text:p text:style-name="PTableBody">活動照片內容：</text:p>
          </table:table-cell>
          <table:table-cell table:style-name="CellBody" office:value-type="string">
            <text:p text:style-name="PTableBody">照片黏貼處</text:p>
            <text:p text:style-name="PTableBody"/>
            <text:p text:style-name="PTableBody"/>
            <text:p text:style-name="PTableBody"/>
            <text:p text:style-name="PTableBody">活動照片內容：</text:p>
          </table:table-cell>
        </table:table-row>
      </table:table>
      <text:h text:style-name="PSection" text:outline-level="2">六、經費使用摘要</text:h>
      <table:table table:name="六、經費使用摘要" table:style-name="TableBase">
        <table:table-column table:style-name="CoNarrow"/>
        <table:table-column table:style-name="CoNarrow"/>
        <table:table-column table:style-name="CoNarrow"/>
        <table:table-column table:style-name="CoNarrow"/>
        <table:table-column table:style-name="CoNarrow"/>
        <table:table-row>
          <table:table-cell table:style-name="CellHeader" office:value-type="string">
            <text:p text:style-name="PTableHeader">預算金額</text:p>
          </table:table-cell>
          <table:table-cell table:style-name="CellHeader" office:value-type="string">
            <text:p text:style-name="PTableHeader">實際支出</text:p>
          </table:table-cell>
          <table:table-cell table:style-name="CellHeader" office:value-type="string">
            <text:p text:style-name="PTableHeader">補助金額</text:p>
          </table:table-cell>
          <table:table-cell table:style-name="CellHeader" office:value-type="string">
            <text:p text:style-name="PTableHeader">自籌金額</text:p>
          </table:table-cell>
          <table:table-cell table:style-name="CellHeader" office:value-type="string">
            <text:p text:style-name="PTableHeader">備註</text:p>
          </table:table-cell>
        </table:table-row>
        <table:table-row>
          <table:table-cell table:style-name="CellBody" office:value-type="string">
            <text:p text:style-name="PTableBody">＿＿＿＿＿＿＿＿＿＿</text:p>
          </table:table-cell>
          <table:table-cell table:style-name="CellBody" office:value-type="string">
            <text:p text:style-name="PTableBody">＿＿＿＿＿＿＿＿＿＿</text:p>
          </table:table-cell>
          <table:table-cell table:style-name="CellBody" office:value-type="string">
            <text:p text:style-name="PTableBody">＿＿＿＿＿＿＿＿＿＿</text:p>
          </table:table-cell>
          <table:table-cell table:style-name="CellBody" office:value-type="string">
            <text:p text:style-name="PTableBody">＿＿＿＿＿＿＿＿＿＿</text:p>
          </table:table-cell>
          <table:table-cell table:style-name="CellBody" office:value-type="string">
            <text:p text:style-name="PTableBody">經費收支結算表另附。</text:p>
          </table:table-cell>
        </table:table-row>
      </table:table>
      <text:h text:style-name="PSection" text:outline-level="2">七、檢討與建議</text:h>
      <text:p text:style-name="PBody">＿＿＿＿＿＿＿＿＿＿</text:p>
      <text:p text:style-name="PBody">＿＿＿＿＿＿＿＿＿＿</text:p>
      <text:h text:style-name="PSection" text:outline-level="2">八、附件清單</text:h>
      <text:list text:style-name="ListDefault">
        <text:list-item>
          <text:p text:style-name="PBody">簽到表</text:p>
        </text:list-item>
        <text:list-item>
          <text:p text:style-name="PBody">活動照片</text:p>
        </text:list-item>
        <text:list-item>
          <text:p text:style-name="PBody">經費收支結算表</text:p>
        </text:list-item>
        <text:list-item>
          <text:p text:style-name="PBody">核銷明細</text:p>
        </text:list-item>
        <text:list-item>
          <text:p text:style-name="PBody">其他附件</text:p>
        </text:list-item>
      </text:list>
      <text:h text:style-name="PSection" text:outline-level="2">九、簽核區</text:h>
      <table:table table:name="九、簽核區" table:style-name="TableBase">
        <table:table-column table:style-name="CoMedium"/>
        <table:table-column table:style-name="CoMedium"/>
        <table:table-column table:style-name="CoMedium"/>
        <table:table-column table:style-name="CoMedium"/>
        <table:table-row>
          <table:table-cell table:style-name="CellHeader" office:value-type="string">
            <text:p text:style-name="PTableHeader">製表人</text:p>
          </table:table-cell>
          <table:table-cell table:style-name="CellHeader" office:value-type="string">
            <text:p text:style-name="PTableHeader">社團負責人</text:p>
          </table:table-cell>
          <table:table-cell table:style-name="CellHeader" office:value-type="string">
            <text:p text:style-name="PTableHeader">指導老師</text:p>
          </table:table-cell>
          <table:table-cell table:style-name="CellHeader" office:value-type="string">
            <text:p text:style-name="PTableHeader">審核單位</text:p>
          </table:table-cell>
        </table:table-row>
        <table:table-row>
          <table:table-cell table:style-name="CellBody" office:value-type="string">
            <text:p text:style-name="PTableBody">＿＿＿＿＿＿＿＿＿＿</text:p>
          </table:table-cell>
          <table:table-cell table:style-name="CellBody" office:value-type="string">
            <text:p text:style-name="PTableBody">＿＿＿＿＿＿＿＿＿＿</text:p>
          </table:table-cell>
          <table:table-cell table:style-name="CellBody" office:value-type="string">
            <text:p text:style-name="PTableBody">＿＿＿＿＿＿＿＿＿＿</text:p>
          </table:table-cell>
          <table:table-cell table:style-name="CellBody" office:value-type="string">
            <text:p text:style-name="PTableBody">＿＿＿＿＿＿＿＿＿＿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office:version="1.2">
  <office:font-face-decls>
    <style:font-face style:name="FormalCJK" svg:font-family="DFKai-SB, BiauKai, Noto Serif CJK TC, Noto Sans CJK TC, serif"/>
  </office:font-face-decls>
  <office:styles>
    <style:default-style style:family="paragraph">
      <style:text-properties style:font-name="FormalCJK" fo:font-family="DFKai-SB, BiauKai, Noto Serif CJK TC, Noto Sans CJK TC, serif" fo:font-size="12pt"/>
    </style:default-style>
    <style:style style:name="Footer" style:family="paragraph">
      <style:paragraph-properties fo:text-align="center"/>
      <style:text-properties style:font-name="FormalCJK" fo:font-family="DFKai-SB, BiauKai, Noto Serif CJK TC, Noto Sans CJK TC, serif" fo:font-size="10pt"/>
    </style:style>
  </office:styles>
  <office:automatic-styles>
    <style:page-layout style:name="pm1">
      <style:page-layout-properties fo:page-width="21cm" fo:page-height="29.7cm" style:print-orientation="portrait" fo:margin-top="2.2cm" fo:margin-bottom="2.2cm" fo:margin-left="2.2cm" fo:margin-right="2.2cm"/>
    </style:page-layout>
  </office:automatic-styles>
  <office:master-styles>
    <style:master-page style:name="Standard" style:page-layout-name="pm1">
      <style:footer>
        <text:p text:style-name="Footer">第<text:page-number text:select-page="current">1</text:page-number>頁　共<text:page-count>1</text:page-count>頁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office:version="1.2">
  <office:meta/>
</office:document-meta>
</file>