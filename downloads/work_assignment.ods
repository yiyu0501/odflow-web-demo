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style="urn:oasis:names:tc:opendocument:xmlns:style:1.0" xmlns:fo="urn:oasis:names:tc:opendocument:xmlns:xsl-fo-compatible:1.0" xmlns:number="urn:oasis:names:tc:opendocument:xmlns:datastyle:1.0" xmlns:of="urn:oasis:names:tc:opendocument:xmlns:of:1.2" office:version="1.2">
  <office:scripts/>
  <office:automatic-styles>
    <style:style style:name="Co1" style:family="table-column">
      <style:table-column-properties style:column-width="1.2cm"/>
    </style:style>
    <style:style style:name="Co2" style:family="table-column">
      <style:table-column-properties style:column-width="2.0cm"/>
    </style:style>
    <style:style style:name="Co3" style:family="table-column">
      <style:table-column-properties style:column-width="2.3cm"/>
    </style:style>
    <style:style style:name="Co4" style:family="table-column">
      <style:table-column-properties style:column-width="3.2cm"/>
    </style:style>
    <style:style style:name="Co5" style:family="table-column">
      <style:table-column-properties style:column-width="4.8cm"/>
    </style:style>
    <style:style style:name="Co6" style:family="table-column">
      <style:table-column-properties style:column-width="2.3cm"/>
    </style:style>
    <style:style style:name="Co7" style:family="table-column">
      <style:table-column-properties style:column-width="2.8cm"/>
    </style:style>
    <style:style style:name="Co8" style:family="table-column">
      <style:table-column-properties style:column-width="2.2cm"/>
    </style:style>
    <style:style style:name="Co9" style:family="table-column">
      <style:table-column-properties style:column-width="2.2cm"/>
    </style:style>
    <style:style style:name="Co10" style:family="table-column">
      <style:table-column-properties style:column-width="1.9cm"/>
    </style:style>
    <style:style style:name="Co11" style:family="table-column">
      <style:table-column-properties style:column-width="1.9cm"/>
    </style:style>
    <style:style style:name="Co12" style:family="table-column">
      <style:table-column-properties style:column-width="3.0cm"/>
    </style:style>
    <style:style style:name="Co13" style:family="table-column">
      <style:table-column-properties style:column-width="2.8cm"/>
    </style:style>
    <style:style style:name="Co14" style:family="table-column">
      <style:table-column-properties style:column-width="2.8cm"/>
    </style:style>
    <style:style style:name="Co1" style:family="table-column">
      <style:table-column-properties style:column-width="4.2cm"/>
    </style:style>
    <style:style style:name="Co2" style:family="table-column">
      <style:table-column-properties style:column-width="2.6cm"/>
    </style:style>
    <style:style style:name="Co3" style:family="table-column">
      <style:table-column-properties style:column-width="4.0cm"/>
    </style:style>
    <style:style style:name="Co4" style:family="table-column">
      <style:table-column-properties style:column-width="4.2cm"/>
    </style:style>
    <number:number-style style:name="NNumber">
      <number:number number:min-integer-digits="1" number:decimal-places="0"/>
    </number:number-style>
    <number:number-style style:name="NAmount">
      <number:number number:min-integer-digits="1" number:decimal-places="0" number:grouping="true"/>
    </number:number-style>
    <number:percentage-style style:name="NPercent">
      <number:number number:min-integer-digits="1" number:decimal-places="2"/>
      <number:text>%</number:text>
    </number:percentage-style>
    <number:date-style style:name="NDate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RowDefault" style:family="table-row">
      <style:table-row-properties style:row-height="0.72cm"/>
    </style:style>
    <style:style style:name="RowTitle" style:family="table-row">
      <style:table-row-properties style:row-height="0.95cm"/>
    </style:style>
    <style:style style:name="RowHeader" style:family="table-row">
      <style:table-row-properties style:row-height="0.82cm"/>
    </style:style>
    <style:style style:name="RowSummary" style:family="table-row">
      <style:table-row-properties style:row-height="0.75cm"/>
    </style:style>
    <style:style style:name="PTitle" style:family="paragraph">
      <style:paragraph-properties fo:text-align="center"/>
      <style:text-properties fo:font-family="DFKai-SB, BiauKai, Noto Serif CJK TC, Noto Sans CJK TC, serif" fo:font-size="15pt" fo:font-weight="bold"/>
    </style:style>
    <style:style style:name="PHeader" style:family="paragraph">
      <style:paragraph-properties fo:text-align="center"/>
      <style:text-properties fo:font-family="DFKai-SB, BiauKai, Noto Serif CJK TC, Noto Sans CJK TC, serif" fo:font-size="11pt" fo:font-weight="bold"/>
    </style:style>
    <style:style style:name="PLabel" style:family="paragraph">
      <style:text-properties fo:font-family="DFKai-SB, BiauKai, Noto Serif CJK TC, Noto Sans CJK TC, serif" fo:font-size="12pt" fo:font-weight="bold"/>
    </style:style>
    <style:style style:name="PBody" style:family="paragraph">
      <style:text-properties fo:font-family="DFKai-SB, BiauKai, Noto Serif CJK TC, Noto Sans CJK TC, serif" fo:font-size="11pt"/>
    </style:style>
    <style:style style:name="PSmall" style:family="paragraph">
      <style:text-properties fo:font-family="DFKai-SB, BiauKai, Noto Serif CJK TC, Noto Sans CJK TC, serif" fo:font-size="9pt"/>
    </style:style>
    <style:style style:name="CellTitle" style:family="table-cell">
      <style:table-cell-properties fo:border="0.03cm solid #4b5563" fo:padding="0.16cm" fo:background-color="#f8fafc"/>
    </style:style>
    <style:style style:name="CellLabel" style:family="table-cell">
      <style:table-cell-properties fo:border="0.03cm solid #6b7280" fo:padding="0.12cm" fo:background-color="#eef2ff"/>
    </style:style>
    <style:style style:name="CellValue" style:family="table-cell">
      <style:table-cell-properties fo:border="0.03cm solid #9ca3af" fo:padding="0.12cm"/>
    </style:style>
    <style:style style:name="CellDate" style:family="table-cell" style:data-style-name="NDate">
      <style:table-cell-properties fo:border="0.03cm solid #9ca3af" fo:padding="0.12cm"/>
    </style:style>
    <style:style style:name="CellHeader" style:family="table-cell">
      <style:table-cell-properties fo:border="0.03cm solid #374151" fo:padding="0.1cm" fo:background-color="#dbeafe"/>
    </style:style>
    <style:style style:name="CellBody" style:family="table-cell">
      <style:table-cell-properties fo:border="0.03cm solid #cbd5e1" fo:padding="0.09cm"/>
    </style:style>
    <style:style style:name="CellNumber" style:family="table-cell" style:data-style-name="NNumber">
      <style:table-cell-properties fo:border="0.03cm solid #cbd5e1" fo:padding="0.09cm"/>
    </style:style>
    <style:style style:name="CellMoney" style:family="table-cell" style:data-style-name="NAmount">
      <style:table-cell-properties fo:border="0.03cm solid #cbd5e1" fo:padding="0.09cm"/>
    </style:style>
    <style:style style:name="CellMoneyFormula" style:family="table-cell" style:data-style-name="NAmount">
      <style:table-cell-properties fo:border="0.03cm solid #94a3b8" fo:padding="0.09cm" fo:background-color="#f8fafc"/>
    </style:style>
    <style:style style:name="CellSummaryHeader" style:family="table-cell">
      <style:table-cell-properties fo:border="0.03cm solid #4b5563" fo:padding="0.1cm" fo:background-color="#e5e7eb"/>
    </style:style>
    <style:style style:name="CellSummaryText" style:family="table-cell">
      <style:table-cell-properties fo:border="0.03cm solid #cbd5e1" fo:padding="0.09cm"/>
    </style:style>
    <style:style style:name="CellSummaryMoney" style:family="table-cell" style:data-style-name="NAmount">
      <style:table-cell-properties fo:border="0.03cm solid #cbd5e1" fo:padding="0.09cm"/>
    </style:style>
    <style:style style:name="CellSummaryFormula" style:family="table-cell" style:data-style-name="NAmount">
      <style:table-cell-properties fo:border="0.03cm solid #cbd5e1" fo:padding="0.09cm" fo:background-color="#f8fafc"/>
    </style:style>
    <style:style style:name="CellSummaryPercent" style:family="table-cell" style:data-style-name="NPercent">
      <style:table-cell-properties fo:border="0.03cm solid #cbd5e1" fo:padding="0.09cm" fo:background-color="#f8fafc"/>
    </style:style>
    <style:style style:name="CellBlank" style:family="table-cell">
      <style:table-cell-properties fo:border="none" fo:padding="0.08cm"/>
    </style:style>
  </office:automatic-styles>
  <office:body>
    <office:spreadsheet>
      <table:content-validation table:name="validation_work_phase" table:allow-empty-cell="true" table:display-list="unsorted" table:condition="of:cell-content-is-in-list(&quot;活動前&quot;;&quot;活動中&quot;;&quot;活動後&quot;;&quot;全程&quot;;&quot;其他&quot;)">
        <table:error-message table:display="true" table:message-type="stop">
          <text:p text:style-name="PSmall">請從階段清單選擇。</text:p>
        </table:error-message>
      </table:content-validation>
      <table:content-validation table:name="validation_work_group" table:allow-empty-cell="true" table:display-list="unsorted" table:condition="of:cell-content-is-in-list(&quot;總籌組&quot;;&quot;行政組&quot;;&quot;活動組&quot;;&quot;場器組&quot;;&quot;宣傳組&quot;;&quot;報名組&quot;;&quot;攝影組&quot;;&quot;財務組&quot;;&quot;文書組&quot;;&quot;接待組&quot;;&quot;機動組&quot;;&quot;其他&quot;)">
        <table:error-message table:display="true" table:message-type="stop">
          <text:p text:style-name="PSmall">請從組別清單選擇，或依實際需要手動調整。</text:p>
        </table:error-message>
      </table:content-validation>
      <table:content-validation table:name="validation_work_status" table:allow-empty-cell="true" table:display-list="unsorted" table:condition="of:cell-content-is-in-list(&quot;未開始&quot;;&quot;處理中&quot;;&quot;已完成&quot;;&quot;待確認&quot;;&quot;延後&quot;;&quot;取消&quot;)">
        <table:error-message table:display="true" table:message-type="stop">
          <text:p text:style-name="PSmall">請從狀態清單選擇。</text:p>
        </table:error-message>
      </table:content-validation>
      <table:content-validation table:name="validation_work_priority" table:allow-empty-cell="true" table:display-list="unsorted" table:condition="of:cell-content-is-in-list(&quot;高&quot;;&quot;中&quot;;&quot;低&quot;)">
        <table:error-message table:display="true" table:message-type="stop">
          <text:p text:style-name="PSmall">請從優先程度清單選擇。</text:p>
        </table:error-message>
      </table:content-validation>
      <table:table table:name="工作分配總表">
        <table:table-column table:style-name="Co1"/>
        <table:table-column table:style-name="Co2"/>
        <table:table-column table:style-name="Co3"/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13"/>
        <table:table-column table:style-name="Co14"/>
        <table:table-row table:style-name="RowTitle">
          <table:table-cell table:style-name="CellTitle" office:value-type="string" table:number-columns-spanned="14">
            <text:p text:style-name="PTitle">工作分配表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RowDefault">
          <table:table-cell table:style-name="CellLabel" office:value-type="string">
            <text:p text:style-name="PLabel">社團名稱</text:p>
          </table:table-cell>
          <table:table-cell table:style-name="CellValue" office:value-type="string">
            <text:p text:style-name="PBody"/>
          </table:table-cell>
          <table:table-cell table:style-name="CellLabel" office:value-type="string">
            <text:p text:style-name="PLabel">活動名稱</text:p>
          </table:table-cell>
          <table:table-cell table:style-name="CellValue" office:value-type="string">
            <text:p text:style-name="PBody"/>
          </table:table-cell>
          <table:table-cell table:style-name="CellLabel" office:value-type="string">
            <text:p text:style-name="PLabel">活動日期</text:p>
          </table:table-cell>
          <table:table-cell table:style-name="CellDate" office:value-type="string">
            <text:p text:style-name="PBody"/>
          </table:table-cell>
          <table:table-cell table:style-name="CellLabel" office:value-type="string">
            <text:p text:style-name="PLabel">活動地點</text:p>
          </table:table-cell>
          <table:table-cell table:style-name="CellValue" office:value-type="string">
            <text:p text:style-name="PBody"/>
          </table:table-cell>
          <table:table-cell table:style-name="CellLabel" office:value-type="string">
            <text:p text:style-name="PLabel">主辦單位</text:p>
          </table:table-cell>
          <table:table-cell table:style-name="CellValue" office:value-type="string">
            <text:p text:style-name="PBody"/>
          </table:table-cell>
          <table:table-cell table:style-name="CellLabel" office:value-type="string">
            <text:p text:style-name="PLabel">活動總召</text:p>
          </table:table-cell>
          <table:table-cell table:style-name="CellValue" office:value-type="string">
            <text:p text:style-name="PBody"/>
          </table:table-cell>
          <table:table-cell table:style-name="CellLabel" office:value-type="string">
            <text:p text:style-name="PLabel">製表日期</text:p>
          </table:table-cell>
          <table:table-cell table:style-name="CellDate" office:value-type="string">
            <text:p text:style-name="PBody"/>
          </table:table-cell>
        </table:table-row>
        <table:table-row table:style-name="RowDefault">
          <table:table-cell table:style-name="CellLabel" office:value-type="string">
            <text:p text:style-name="PLabel">備註</text:p>
          </table:table-cell>
          <table:table-cell table:style-name="CellValue" office:value-type="string" table:number-columns-spanned="13">
            <text:p text:style-name="PBody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RowDefault"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</table:table-row>
        <table:table-row table:style-name="RowHeader">
          <table:table-cell table:style-name="CellHeader" office:value-type="string">
            <text:p text:style-name="PHeader">序號</text:p>
          </table:table-cell>
          <table:table-cell table:style-name="CellHeader" office:value-type="string">
            <text:p text:style-name="PHeader">階段</text:p>
          </table:table-cell>
          <table:table-cell table:style-name="CellHeader" office:value-type="string">
            <text:p text:style-name="PHeader">組別</text:p>
          </table:table-cell>
          <table:table-cell table:style-name="CellHeader" office:value-type="string">
            <text:p text:style-name="PHeader">工作項目</text:p>
          </table:table-cell>
          <table:table-cell table:style-name="CellHeader" office:value-type="string">
            <text:p text:style-name="PHeader">工作內容</text:p>
          </table:table-cell>
          <table:table-cell table:style-name="CellHeader" office:value-type="string">
            <text:p text:style-name="PHeader">負責人</text:p>
          </table:table-cell>
          <table:table-cell table:style-name="CellHeader" office:value-type="string">
            <text:p text:style-name="PHeader">協助人員</text:p>
          </table:table-cell>
          <table:table-cell table:style-name="CellHeader" office:value-type="string">
            <text:p text:style-name="PHeader">開始日期</text:p>
          </table:table-cell>
          <table:table-cell table:style-name="CellHeader" office:value-type="string">
            <text:p text:style-name="PHeader">完成期限</text:p>
          </table:table-cell>
          <table:table-cell table:style-name="CellHeader" office:value-type="string">
            <text:p text:style-name="PHeader">狀態</text:p>
          </table:table-cell>
          <table:table-cell table:style-name="CellHeader" office:value-type="string">
            <text:p text:style-name="PHeader">優先程度</text:p>
          </table:table-cell>
          <table:table-cell table:style-name="CellHeader" office:value-type="string">
            <text:p text:style-name="PHeader">所需資源</text:p>
          </table:table-cell>
          <table:table-cell table:style-name="CellHeader" office:value-type="string">
            <text:p text:style-name="PHeader">對應流程時間</text:p>
          </table:table-cell>
          <table:table-cell table:style-name="CellHeader" office:value-type="string">
            <text:p text:style-name="PHeader">備註</text:p>
          </table:table-cell>
        </table:table-row>
        <table:table-row table:style-name="RowDefault">
          <table:table-cell table:style-name="CellNumber" office:value-type="float" office:value="1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2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3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4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5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6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7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8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9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10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11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12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13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14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15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16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17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18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19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20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21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22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23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24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25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26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27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28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29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30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31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32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33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34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35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36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37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38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39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40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41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42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43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44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45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46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47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48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49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50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51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52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53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54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55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56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57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58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59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60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61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62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63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64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65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66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67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68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69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70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71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72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73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74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75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76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77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78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79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80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81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82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83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84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85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86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87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88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89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90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91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92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93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94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95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96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97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98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99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100">
            <text:p text:style-name="PBody"/>
          </table:table-cell>
          <table:table-cell table:style-name="CellBody" office:value-type="string" table:content-validation-name="validation_work_phase">
            <text:p text:style-name="PBody"/>
          </table:table-cell>
          <table:table-cell table:style-name="CellBody" office:value-type="string" table:content-validation-name="validation_work_group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work_status">
            <text:p text:style-name="PBody"/>
          </table:table-cell>
          <table:table-cell table:style-name="CellBody" office:value-type="string" table:content-validation-name="validation_work_priorit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</table:table-row>
        <table:table-row table:style-name="RowHeader">
          <table:table-cell table:style-name="CellSummaryHeader" office:value-type="string" table:number-columns-spanned="14">
            <text:p text:style-name="PHeader">重要提醒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RowSummary">
          <table:table-cell table:style-name="CellSummaryText" office:value-type="string" table:number-columns-spanned="14">
            <text:p text:style-name="PBody">工作項目若延後或取消，請在備註補充原因與替代方案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RowSummary">
          <table:table-cell table:style-name="CellSummaryHeader" office:value-type="string" table:number-columns-spanned="2">
            <text:p text:style-name="PHeader">聯絡窗口</text:p>
          </table:table-cell>
          <table:table-cell table:style-name="CellSummaryText" office:value-type="string" table:number-columns-spanned="5">
            <text:p text:style-name="PBody"/>
          </table:table-cell>
          <table:covered-table-cell/>
          <table:covered-table-cell/>
          <table:covered-table-cell/>
          <table:covered-table-cell/>
          <table:table-cell table:style-name="CellSummaryHeader" office:value-type="string" table:number-columns-spanned="2">
            <text:p text:style-name="PHeader">活動負責人</text:p>
          </table:table-cell>
          <table:table-cell table:style-name="CellSummaryText" office:value-type="string" table:number-columns-spanned="5">
            <text:p text:style-name="PBody"/>
          </table:table-cell>
          <table:covered-table-cell/>
          <table:covered-table-cell/>
          <table:covered-table-cell/>
          <table:covered-table-cell/>
        </table:table-row>
        <table:table-row table:style-name="RowSummary">
          <table:table-cell table:style-name="CellSummaryHeader" office:value-type="string" table:number-columns-spanned="2">
            <text:p text:style-name="PHeader">製表人</text:p>
          </table:table-cell>
          <table:table-cell table:style-name="CellSummaryText" office:value-type="string" table:number-columns-spanned="3">
            <text:p text:style-name="PBody"/>
          </table:table-cell>
          <table:covered-table-cell/>
          <table:covered-table-cell/>
          <table:table-cell table:style-name="CellSummaryHeader" office:value-type="string" table:number-columns-spanned="2">
            <text:p text:style-name="PHeader">社團負責人</text:p>
          </table:table-cell>
          <table:table-cell table:style-name="CellSummaryText" office:value-type="string" table:number-columns-spanned="3">
            <text:p text:style-name="PBody"/>
          </table:table-cell>
          <table:covered-table-cell/>
          <table:covered-table-cell/>
          <table:table-cell table:style-name="CellSummaryHeader" office:value-type="string" table:number-columns-spanned="2">
            <text:p text:style-name="PHeader">指導老師</text:p>
          </table:table-cell>
          <table:table-cell table:style-name="CellSummaryText" office:value-type="string" table:number-columns-spanned="2">
            <text:p text:style-name="PBody"/>
          </table:table-cell>
          <table:covered-table-cell/>
        </table:table-row>
      </table:table>
      <table:table table:name="統計摘要">
        <table:table-column table:style-name="Co1"/>
        <table:table-column table:style-name="Co2"/>
        <table:table-column table:style-name="Co3"/>
        <table:table-column table:style-name="Co4"/>
        <table:table-row table:style-name="RowTitle">
          <table:table-cell table:style-name="CellTitle" office:value-type="string" table:number-columns-spanned="4">
            <text:p text:style-name="PTitle">統計摘要</text:p>
          </table:table-cell>
          <table:covered-table-cell/>
          <table:covered-table-cell/>
          <table:covered-table-cell/>
        </table:table-row>
        <table:table-row table:style-name="RowHeader">
          <table:table-cell table:style-name="CellSummaryHeader" office:value-type="string">
            <text:p text:style-name="PHeader">統計項目</text:p>
          </table:table-cell>
          <table:table-cell table:style-name="CellSummaryHeader" office:value-type="string">
            <text:p text:style-name="PHeader">數值</text:p>
          </table:table-cell>
          <table:table-cell table:style-name="CellSummaryHeader" office:value-type="string">
            <text:p text:style-name="PHeader">統計項目</text:p>
          </table:table-cell>
          <table:table-cell table:style-name="CellSummaryHeader" office:value-type="string">
            <text:p text:style-name="PHeader">數值</text:p>
          </table:table-cell>
        </table:table-row>
        <table:table-row table:style-name="RowSummary">
          <table:table-cell table:style-name="CellSummaryText" office:value-type="string">
            <text:p text:style-name="PLabel">工作項目總數</text:p>
          </table:table-cell>
          <table:table-cell table:style-name="CellSummaryFormula" office:value-type="float" office:value="0" table:formula="=COUNTA(['工作分配總表'.$D$8:'工作分配總表'.$D$107])">
            <text:p text:style-name="PBody"/>
          </table:table-cell>
          <table:table-cell table:style-name="CellSummaryText" office:value-type="string">
            <text:p text:style-name="PLabel">未開始件數</text:p>
          </table:table-cell>
          <table:table-cell table:style-name="CellSummaryFormula" office:value-type="float" office:value="0" table:formula="=COUNTIF(['工作分配總表'.$J$8:'工作分配總表'.$J$107];&quot;未開始&quot;)">
            <text:p text:style-name="PBody"/>
          </table:table-cell>
        </table:table-row>
        <table:table-row table:style-name="RowSummary">
          <table:table-cell table:style-name="CellSummaryText" office:value-type="string">
            <text:p text:style-name="PLabel">處理中件數</text:p>
          </table:table-cell>
          <table:table-cell table:style-name="CellSummaryFormula" office:value-type="float" office:value="0" table:formula="=COUNTIF(['工作分配總表'.$J$8:'工作分配總表'.$J$107];&quot;處理中&quot;)">
            <text:p text:style-name="PBody"/>
          </table:table-cell>
          <table:table-cell table:style-name="CellSummaryText" office:value-type="string">
            <text:p text:style-name="PLabel">已完成件數</text:p>
          </table:table-cell>
          <table:table-cell table:style-name="CellSummaryFormula" office:value-type="float" office:value="0" table:formula="=COUNTIF(['工作分配總表'.$J$8:'工作分配總表'.$J$107];&quot;已完成&quot;)">
            <text:p text:style-name="PBody"/>
          </table:table-cell>
        </table:table-row>
        <table:table-row table:style-name="RowSummary">
          <table:table-cell table:style-name="CellSummaryText" office:value-type="string">
            <text:p text:style-name="PLabel">待確認件數</text:p>
          </table:table-cell>
          <table:table-cell table:style-name="CellSummaryFormula" office:value-type="float" office:value="0" table:formula="=COUNTIF(['工作分配總表'.$J$8:'工作分配總表'.$J$107];&quot;待確認&quot;)">
            <text:p text:style-name="PBody"/>
          </table:table-cell>
          <table:table-cell table:style-name="CellSummaryText" office:value-type="string">
            <text:p text:style-name="PLabel">延後件數</text:p>
          </table:table-cell>
          <table:table-cell table:style-name="CellSummaryFormula" office:value-type="float" office:value="0" table:formula="=COUNTIF(['工作分配總表'.$J$8:'工作分配總表'.$J$107];&quot;延後&quot;)">
            <text:p text:style-name="PBody"/>
          </table:table-cell>
        </table:table-row>
        <table:table-row table:style-name="RowSummary">
          <table:table-cell table:style-name="CellSummaryText" office:value-type="string">
            <text:p text:style-name="PLabel">取消件數</text:p>
          </table:table-cell>
          <table:table-cell table:style-name="CellSummaryFormula" office:value-type="float" office:value="0" table:formula="=COUNTIF(['工作分配總表'.$J$8:'工作分配總表'.$J$107];&quot;取消&quot;)">
            <text:p text:style-name="PBody"/>
          </table:table-cell>
          <table:table-cell table:style-name="CellSummaryText" office:value-type="string">
            <text:p text:style-name="PLabel">高優先工作數</text:p>
          </table:table-cell>
          <table:table-cell table:style-name="CellSummaryFormula" office:value-type="float" office:value="0" table:formula="=COUNTIF(['工作分配總表'.$K$8:'工作分配總表'.$K$107];&quot;高&quot;)">
            <text:p text:style-name="PBody"/>
          </table:table-cell>
        </table:table-row>
        <table:table-row table:style-name="RowSummary">
          <table:table-cell table:style-name="CellSummaryText" office:value-type="string">
            <text:p text:style-name="PLabel">完成率</text:p>
          </table:table-cell>
          <table:table-cell table:style-name="CellSummaryPercent" office:value-type="float" office:value="0" table:formula="=IF(COUNTA(['工作分配總表'.$D$8:'工作分配總表'.$D$107])=0;0;COUNTIF(['工作分配總表'.$J$8:'工作分配總表'.$J$107];&quot;已完成&quot;)/COUNTA(['工作分配總表'.$D$8:'工作分配總表'.$D$107]))">
            <text:p text:style-name="PBody"/>
          </table:table-cell>
          <table:table-cell table:style-name="CellSummaryText" office:value-type="string">
            <text:p text:style-name="PLabel">逾期未完成件數</text:p>
          </table:table-cell>
          <table:table-cell table:style-name="CellSummaryFormula" office:value-type="float" office:value="0" table:formula="=COUNTIFS(['工作分配總表'.$I$8:'工作分配總表'.$I$107];&quot;&lt;&quot;&amp;TODAY();['工作分配總表'.$J$8:'工作分配總表'.$J$107];&quot;&lt;&gt;已完成&quot;;['工作分配總表'.$J$8:'工作分配總表'.$J$107];&quot;&lt;&gt;取消&quot;)">
            <text:p text:style-name="PBody"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default-style style:family="paragraph">
      <style:text-properties fo:font-family="DFKai-SB, BiauKai, Noto Serif CJK TC, Noto Sans CJK TC, serif" fo:font-size="12pt"/>
    </style:default-style>
  </office:styles>
  <office:automatic-styles/>
  <office:master-styles/>
</office:document-styles>
</file>

<file path=meta.xml><?xml version="1.0" encoding="utf-8"?>
<office:document-meta xmlns:office="urn:oasis:names:tc:opendocument:xmlns:office:1.0" xmlns:meta="urn:oasis:names:tc:opendocument:xmlns:meta:1.0" office:version="1.2">
  <office:meta/>
</office:document-meta>
</file>