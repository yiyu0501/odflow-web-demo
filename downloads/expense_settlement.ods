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number="urn:oasis:names:tc:opendocument:xmlns:datastyle:1.0" xmlns:of="urn:oasis:names:tc:opendocument:xmlns:of:1.2" office:version="1.2">
  <office:scripts/>
  <office:automatic-styles>
    <style:style style:name="Co1" style:family="table-column">
      <style:table-column-properties style:column-width="6.6cm"/>
    </style:style>
    <style:style style:name="Co2" style:family="table-column">
      <style:table-column-properties style:column-width="3.6cm"/>
    </style:style>
    <style:style style:name="Co3" style:family="table-column">
      <style:table-column-properties style:column-width="3.6cm"/>
    </style:style>
    <style:style style:name="Co4" style:family="table-column">
      <style:table-column-properties style:column-width="5.0cm"/>
    </style:style>
    <number:number-style style:name="NNumber">
      <number:number number:min-integer-digits="1" number:decimal-places="0"/>
    </number:number-style>
    <number:number-style style:name="NAmount">
      <number:number number:min-integer-digits="1" number:decimal-places="0" number:grouping="true"/>
    </number:number-style>
    <number:percentage-style style:name="NPercent">
      <number:number number:min-integer-digits="1" number:decimal-places="2"/>
      <number:text>%</number:text>
    </number:percentage-style>
    <number:date-style style:name="NDate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RowDefault" style:family="table-row">
      <style:table-row-properties style:row-height="0.72cm"/>
    </style:style>
    <style:style style:name="RowTitle" style:family="table-row">
      <style:table-row-properties style:row-height="0.95cm"/>
    </style:style>
    <style:style style:name="RowHeader" style:family="table-row">
      <style:table-row-properties style:row-height="0.82cm"/>
    </style:style>
    <style:style style:name="RowSummary" style:family="table-row">
      <style:table-row-properties style:row-height="0.75cm"/>
    </style:style>
    <style:style style:name="PTitle" style:family="paragraph">
      <style:paragraph-properties fo:text-align="center"/>
      <style:text-properties fo:font-family="DFKai-SB, BiauKai, Noto Serif CJK TC, Noto Sans CJK TC, serif" fo:font-size="15pt" fo:font-weight="bold"/>
    </style:style>
    <style:style style:name="PHeader" style:family="paragraph">
      <style:paragraph-properties fo:text-align="center"/>
      <style:text-properties fo:font-family="DFKai-SB, BiauKai, Noto Serif CJK TC, Noto Sans CJK TC, serif" fo:font-size="11pt" fo:font-weight="bold"/>
    </style:style>
    <style:style style:name="PLabel" style:family="paragraph">
      <style:text-properties fo:font-family="DFKai-SB, BiauKai, Noto Serif CJK TC, Noto Sans CJK TC, serif" fo:font-size="12pt" fo:font-weight="bold"/>
    </style:style>
    <style:style style:name="PBody" style:family="paragraph">
      <style:text-properties fo:font-family="DFKai-SB, BiauKai, Noto Serif CJK TC, Noto Sans CJK TC, serif" fo:font-size="11pt"/>
    </style:style>
    <style:style style:name="PSmall" style:family="paragraph">
      <style:text-properties fo:font-family="DFKai-SB, BiauKai, Noto Serif CJK TC, Noto Sans CJK TC, serif" fo:font-size="9pt"/>
    </style:style>
    <style:style style:name="CellTitle" style:family="table-cell">
      <style:table-cell-properties fo:border="0.03cm solid #4b5563" fo:padding="0.16cm" fo:background-color="#f8fafc"/>
    </style:style>
    <style:style style:name="CellLabel" style:family="table-cell">
      <style:table-cell-properties fo:border="0.03cm solid #6b7280" fo:padding="0.12cm" fo:background-color="#eef2ff"/>
    </style:style>
    <style:style style:name="CellValue" style:family="table-cell">
      <style:table-cell-properties fo:border="0.03cm solid #9ca3af" fo:padding="0.12cm"/>
    </style:style>
    <style:style style:name="CellDate" style:family="table-cell" style:data-style-name="NDate">
      <style:table-cell-properties fo:border="0.03cm solid #9ca3af" fo:padding="0.12cm"/>
    </style:style>
    <style:style style:name="CellHeader" style:family="table-cell">
      <style:table-cell-properties fo:border="0.03cm solid #374151" fo:padding="0.1cm" fo:background-color="#dbeafe"/>
    </style:style>
    <style:style style:name="CellBody" style:family="table-cell">
      <style:table-cell-properties fo:border="0.03cm solid #cbd5e1" fo:padding="0.09cm"/>
    </style:style>
    <style:style style:name="CellNumber" style:family="table-cell" style:data-style-name="NNumber">
      <style:table-cell-properties fo:border="0.03cm solid #cbd5e1" fo:padding="0.09cm"/>
    </style:style>
    <style:style style:name="CellMoney" style:family="table-cell" style:data-style-name="NAmount">
      <style:table-cell-properties fo:border="0.03cm solid #cbd5e1" fo:padding="0.09cm"/>
    </style:style>
    <style:style style:name="CellMoneyFormula" style:family="table-cell" style:data-style-name="NAmount">
      <style:table-cell-properties fo:border="0.03cm solid #94a3b8" fo:padding="0.09cm" fo:background-color="#f8fafc"/>
    </style:style>
    <style:style style:name="CellSummaryHeader" style:family="table-cell">
      <style:table-cell-properties fo:border="0.03cm solid #4b5563" fo:padding="0.1cm" fo:background-color="#e5e7eb"/>
    </style:style>
    <style:style style:name="CellSummaryText" style:family="table-cell">
      <style:table-cell-properties fo:border="0.03cm solid #cbd5e1" fo:padding="0.09cm"/>
    </style:style>
    <style:style style:name="CellSummaryMoney" style:family="table-cell" style:data-style-name="NAmount">
      <style:table-cell-properties fo:border="0.03cm solid #cbd5e1" fo:padding="0.09cm"/>
    </style:style>
    <style:style style:name="CellSummaryFormula" style:family="table-cell" style:data-style-name="NAmount">
      <style:table-cell-properties fo:border="0.03cm solid #cbd5e1" fo:padding="0.09cm" fo:background-color="#f8fafc"/>
    </style:style>
    <style:style style:name="CellSummaryPercent" style:family="table-cell" style:data-style-name="NPercent">
      <style:table-cell-properties fo:border="0.03cm solid #cbd5e1" fo:padding="0.09cm" fo:background-color="#f8fafc"/>
    </style:style>
    <style:style style:name="CellBlank" style:family="table-cell">
      <style:table-cell-properties fo:border="none" fo:padding="0.08cm"/>
    </style:style>
  </office:automatic-styles>
  <office:body>
    <office:spreadsheet>
      <table:content-validations>
        <table:content-validation table:name="validation_settlement_note" table:allow-empty-cell="true" table:display-list="unsorted" table:condition="of:cell-content-is-in-list(&quot;學校補助&quot;;&quot;校外補助&quot;;&quot;社團會費&quot;;&quot;自籌&quot;;&quot;其他&quot;)">
          <table:error-message table:display="true" table:message-type="warning">
            <text:p text:style-name="PSmall">建議從清單選擇補助來源分類；若需補充說明，可手動調整文字。</text:p>
          </table:error-message>
        </table:content-validation>
      </table:content-validations>
      <table:table table:name="經費收支結算表">
        <table:table-column table:style-name="Co1"/>
        <table:table-column table:style-name="Co2"/>
        <table:table-column table:style-name="Co3"/>
        <table:table-column table:style-name="Co4"/>
        <table:table-row table:style-name="RowTitle">
          <table:table-cell table:style-name="CellBlank" office:value-type="string" table:number-columns-spanned="4">
            <text:p text:style-name="PTitle">臺北市立大學</text:p>
          </table:table-cell>
          <table:covered-table-cell/>
          <table:covered-table-cell/>
          <table:covered-table-cell/>
        </table:table-row>
        <table:table-row table:style-name="RowTitle">
          <table:table-cell table:style-name="CellBlank" office:value-type="string" table:number-columns-spanned="4">
            <text:p text:style-name="PTitle">社團活動經費收支結算表</text:p>
          </table:table-cell>
          <table:covered-table-cell/>
          <table:covered-table-cell/>
          <table:covered-table-cell/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活動名稱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日期</text:p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活動地點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參加人數</text:p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記錄人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結算日期</text:p>
          </table:table-cell>
          <table:table-cell table:style-name="CellValue" office:value-type="string">
            <text:p text:style-name="PBody"/>
          </table:table-cell>
        </table:table-row>
        <table:table-row table:style-name="RowHeader">
          <table:table-cell table:style-name="CellHeader" office:value-type="string">
            <text:p text:style-name="PHeader">項目</text:p>
          </table:table-cell>
          <table:table-cell table:style-name="CellHeader" office:value-type="string">
            <text:p text:style-name="PHeader">預算通過金額</text:p>
          </table:table-cell>
          <table:table-cell table:style-name="CellHeader" office:value-type="string">
            <text:p text:style-name="PHeader">實際支出金額</text:p>
          </table:table-cell>
          <table:table-cell table:style-name="CellHeader" office:value-type="string">
            <text:p text:style-name="PHeader">備註</text:p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settlement_note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settlement_note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settlement_note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settlement_note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settlement_note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settlement_note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settlement_note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settlement_note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settlement_note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Body" office:value-type="string" table:content-validation-name="validation_settlement_note">
            <text:p text:style-name="PBody"/>
          </table:table-cell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SummaryHeader" office:value-type="string" table:number-columns-spanned="4">
            <text:p text:style-name="PHeader">結算公式區</text:p>
          </table:table-cell>
          <table:covered-table-cell/>
          <table:covered-table-cell/>
          <table:covered-table-cell/>
        </table:table-row>
        <table:table-row table:style-name="RowSummary">
          <table:table-cell table:style-name="CellSummaryText" office:value-type="string">
            <text:p text:style-name="PLabel">支出金額總計</text:p>
          </table:table-cell>
          <table:table-cell table:style-name="CellSummaryFormula" office:value-type="float" office:value="0" table:formula="=SUM([.B8:.B17])">
            <text:p text:style-name="PBody"/>
          </table:table-cell>
          <table:table-cell table:style-name="CellSummaryFormula" office:value-type="float" office:value="0" table:formula="=SUM([.C8:.C17])">
            <text:p text:style-name="PBody"/>
          </table:table-cell>
          <table:table-cell table:style-name="CellSummaryText" office:value-type="string">
            <text:p text:style-name="PBody">預算通過總額 / 實際支出總額</text:p>
          </table:table-cell>
        </table:table-row>
        <table:table-row table:style-name="RowSummary">
          <table:table-cell table:style-name="CellSummaryText" office:value-type="string">
            <text:p text:style-name="PLabel">學校補助通過金額</text:p>
          </table:table-cell>
          <table:table-cell table:style-name="CellSummaryFormula" office:value-type="float" office:value="0" table:formula="=SUMIF([.D8:.D17];&quot;學校補助&quot;;[.B8:.B17])">
            <text:p text:style-name="PBody"/>
          </table:table-cell>
          <table:table-cell table:style-name="CellSummaryText" office:value-type="string">
            <text:p text:style-name="PBody"/>
          </table:table-cell>
          <table:table-cell table:style-name="CellSummaryText" office:value-type="string">
            <text:p text:style-name="PBody">備註為「學校補助」的預算通過金額總和</text:p>
          </table:table-cell>
        </table:table-row>
        <table:table-row table:style-name="RowSummary">
          <table:table-cell table:style-name="CellSummaryText" office:value-type="string">
            <text:p text:style-name="PLabel">學校補助實際支出金額</text:p>
          </table:table-cell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.D8:.D17];&quot;學校補助&quot;;[.C8:.C17])">
            <text:p text:style-name="PBody"/>
          </table:table-cell>
          <table:table-cell table:style-name="CellSummaryText" office:value-type="string">
            <text:p text:style-name="PBody">備註為「學校補助」的實際支出金額總和</text:p>
          </table:table-cell>
        </table:table-row>
        <table:table-row table:style-name="RowSummary">
          <table:table-cell table:style-name="CellSummaryText" office:value-type="string">
            <text:p text:style-name="PLabel">實際執行比例</text:p>
          </table:table-cell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IF(SUM([.B8:.B17])=0;0;SUM([.C8:.C17])/SUM([.B8:.B17]))">
            <text:p text:style-name="PBody"/>
          </table:table-cell>
          <table:table-cell table:style-name="CellSummaryText" office:value-type="string">
            <text:p text:style-name="PBody">若預算通過總額為 0，比例顯示 0</text:p>
          </table:table-cell>
        </table:table-row>
        <table:table-row table:style-name="RowSummary">
          <table:table-cell table:style-name="CellSummaryText" office:value-type="string">
            <text:p text:style-name="PLabel">學校補助核銷金額總計</text:p>
          </table:table-cell>
          <table:table-cell table:style-name="CellSummaryFormula" office:value-type="float" office:value="0" table:formula="=IF(SUM([.B8:.B17])=0;0;MIN(SUMIF([.D8:.D17];&quot;學校補助&quot;;[.B8:.B17]);SUMIF([.D8:.D17];&quot;學校補助&quot;;[.C8:.C17]);SUMIF([.D8:.D17];&quot;學校補助&quot;;[.B8:.B17])*(SUM([.C8:.C17])/SUM([.B8:.B17]))))">
            <text:p text:style-name="PBody"/>
          </table:table-cell>
          <table:table-cell table:style-name="CellSummaryText" office:value-type="string">
            <text:p text:style-name="PBody"/>
          </table:table-cell>
          <table:table-cell table:style-name="CellSummaryText" office:value-type="string">
            <text:p text:style-name="PBody">採保守 MIN 公式計算</text:p>
          </table:table-cell>
        </table:table-row>
        <table:table-row table:style-name="RowSummary">
          <table:table-cell table:style-name="CellSummaryText" office:value-type="string">
            <text:p text:style-name="PLabel">得補助金額上限：A × B / C</text:p>
          </table:table-cell>
          <table:table-cell table:style-name="CellSummaryFormula" office:value-type="float" office:value="0" table:formula="=IF(SUM([.B8:.B17])=0;0;MIN(SUMIF([.D8:.D17];&quot;學校補助&quot;;[.B8:.B17]);SUMIF([.D8:.D17];&quot;學校補助&quot;;[.C8:.C17]);SUMIF([.D8:.D17];&quot;學校補助&quot;;[.B8:.B17])*(SUM([.C8:.C17])/SUM([.B8:.B17]))))">
            <text:p text:style-name="PBody"/>
          </table:table-cell>
          <table:table-cell table:style-name="CellSummaryText" office:value-type="string">
            <text:p text:style-name="PBody"/>
          </table:table-cell>
          <table:table-cell table:style-name="CellSummaryText" office:value-type="string">
            <text:p text:style-name="PBody">應以申請金額為上限</text:p>
          </table:table-cell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SummaryHeader" office:value-type="string" table:number-columns-spanned="4">
            <text:p text:style-name="PHeader">補助公式備註</text:p>
          </table:table-cell>
          <table:covered-table-cell/>
          <table:covered-table-cell/>
          <table:covered-table-cell/>
        </table:table-row>
        <table:table-row table:style-name="RowSummary">
          <table:table-cell table:style-name="CellSummaryText" office:value-type="string" table:number-columns-spanned="4">
            <text:p text:style-name="PBody">得補助金額上限：A × B / C</text:p>
          </table:table-cell>
          <table:covered-table-cell/>
          <table:covered-table-cell/>
          <table:covered-table-cell/>
        </table:table-row>
        <table:table-row table:style-name="RowSummary">
          <table:table-cell table:style-name="CellSummaryText" office:value-type="string" table:number-columns-spanned="4">
            <text:p text:style-name="PBody">A：學校補助通過金額</text:p>
          </table:table-cell>
          <table:covered-table-cell/>
          <table:covered-table-cell/>
          <table:covered-table-cell/>
        </table:table-row>
        <table:table-row table:style-name="RowSummary">
          <table:table-cell table:style-name="CellSummaryText" office:value-type="string" table:number-columns-spanned="4">
            <text:p text:style-name="PBody">B：實際支出總額</text:p>
          </table:table-cell>
          <table:covered-table-cell/>
          <table:covered-table-cell/>
          <table:covered-table-cell/>
        </table:table-row>
        <table:table-row table:style-name="RowSummary">
          <table:table-cell table:style-name="CellSummaryText" office:value-type="string" table:number-columns-spanned="4">
            <text:p text:style-name="PBody">C：預算通過總額</text:p>
          </table:table-cell>
          <table:covered-table-cell/>
          <table:covered-table-cell/>
          <table:covered-table-cell/>
        </table:table-row>
        <table:table-row table:style-name="RowSummary">
          <table:table-cell table:style-name="CellSummaryText" office:value-type="string" table:number-columns-spanned="4">
            <text:p text:style-name="PBody">應以申請金額為上限</text:p>
          </table:table-cell>
          <table:covered-table-cell/>
          <table:covered-table-cell/>
          <table:covered-table-cell/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SummaryHeader" office:value-type="string" table:number-columns-spanned="4">
            <text:p text:style-name="PHeader">簽核區</text:p>
          </table:table-cell>
          <table:covered-table-cell/>
          <table:covered-table-cell/>
          <table:covered-table-cell/>
        </table:table-row>
        <table:table-row table:style-name="RowDefault">
          <table:table-cell table:style-name="CellLabel" office:value-type="string">
            <text:p text:style-name="PLabel">活動承辦人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課外組承辦人</text:p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組長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學務長</text:p>
          </table:table-cell>
          <table:table-cell table:style-name="CellValue" office:value-type="string">
            <text:p text:style-name="PBody"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paragraph">
      <style:text-properties fo:font-family="DFKai-SB, BiauKai, Noto Serif CJK TC, Noto Sans CJK TC, serif" fo:font-size="12pt"/>
    </style:default-style>
  </office:styles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