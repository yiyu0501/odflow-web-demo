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scripts/>
  <office:automatic-styles>
    <style:style style:name="PBody" style:family="paragraph">
      <style:paragraph-properties fo:margin-top="0cm" fo:margin-bottom="0.14cm" fo:line-height="130%"/>
      <style:text-properties fo:font-family="DFKai-SB, BiauKai, Noto Serif CJK TC, Noto Sans CJK TC, serif" fo:font-size="12pt"/>
    </style:style>
    <style:style style:name="PTitle" style:family="paragraph">
      <style:paragraph-properties fo:text-align="center" fo:margin-top="0cm" fo:margin-bottom="0.35cm"/>
      <style:text-properties fo:font-family="DFKai-SB, BiauKai, Noto Serif CJK TC, Noto Sans CJK TC, serif" fo:font-size="18pt" fo:font-weight="bold"/>
    </style:style>
    <style:style style:name="PSection" style:family="paragraph">
      <style:paragraph-properties fo:margin-top="0.28cm" fo:margin-bottom="0.14cm"/>
      <style:text-properties fo:font-family="DFKai-SB, BiauKai, Noto Serif CJK TC, Noto Sans CJK TC, serif" fo:font-size="14pt" fo:font-weight="bold"/>
    </style:style>
    <style:style style:name="PLabel" style:family="paragraph">
      <style:paragraph-properties fo:margin-top="0cm" fo:margin-bottom="0cm"/>
      <style:text-properties fo:font-family="DFKai-SB, BiauKai, Noto Serif CJK TC, Noto Sans CJK TC, serif" fo:font-size="11pt" fo:font-weight="bold"/>
    </style:style>
    <style:style style:name="PTableHeader" style:family="paragraph">
      <style:paragraph-properties fo:text-align="center" fo:margin-top="0cm" fo:margin-bottom="0cm"/>
      <style:text-properties fo:font-family="DFKai-SB, BiauKai, Noto Serif CJK TC, Noto Sans CJK TC, serif" fo:font-size="11pt" fo:font-weight="bold"/>
    </style:style>
    <style:style style:name="PTableBody" style:family="paragraph">
      <style:paragraph-properties fo:margin-top="0cm" fo:margin-bottom="0cm"/>
      <style:text-properties fo:font-family="DFKai-SB, BiauKai, Noto Serif CJK TC, Noto Sans CJK TC, serif" fo:font-size="11pt"/>
    </style:style>
    <style:style style:name="PNote" style:family="paragraph">
      <style:paragraph-properties fo:margin-top="0.08cm" fo:margin-bottom="0.08cm"/>
      <style:text-properties fo:font-family="DFKai-SB, BiauKai, Noto Serif CJK TC, Noto Sans CJK TC, serif" fo:font-size="10pt"/>
    </style:style>
    <text:list-style style:name="ListDefault">
      <text:list-level-style-bullet text:level="1" text:bullet-char="•">
        <style:list-level-properties text:space-before="0.5cm" text:min-label-width="0.35cm"/>
      </text:list-level-style-bullet>
    </text:list-style>
    <style:style style:name="TableBase" style:family="table">
      <style:table-properties table:border-model="collapsing"/>
    </style:style>
    <style:style style:name="CoWide" style:family="table-column">
      <style:table-column-properties style:column-width="4.8cm"/>
    </style:style>
    <style:style style:name="CoMedium" style:family="table-column">
      <style:table-column-properties style:column-width="3.3cm"/>
    </style:style>
    <style:style style:name="CoNarrow" style:family="table-column">
      <style:table-column-properties style:column-width="2.6cm"/>
    </style:style>
    <style:style style:name="CellLabel" style:family="table-cell">
      <style:table-cell-properties fo:border="0.03cm solid #333333" fo:padding="0.08cm" fo:background-color="#efefef"/>
    </style:style>
    <style:style style:name="CellValue" style:family="table-cell">
      <style:table-cell-properties fo:border="0.03cm solid #333333" fo:padding="0.08cm"/>
    </style:style>
    <style:style style:name="CellHeader" style:family="table-cell">
      <style:table-cell-properties fo:border="0.03cm solid #333333" fo:padding="0.08cm" fo:background-color="#d9d9d9"/>
    </style:style>
    <style:style style:name="CellBody" style:family="table-cell">
      <style:table-cell-properties fo:border="0.03cm solid #333333" fo:padding="0.08cm"/>
    </style:style>
  </office:automatic-styles>
  <office:body>
    <office:text>
      <text:h text:style-name="PTitle" text:outline-level="1">{{school_name}}{{club_name}}</text:h>
      <text:h text:style-name="PTitle" text:outline-level="1">第{{meeting_number}}次{{meeting_type}}紀錄</text:h>
      <text:p text:style-name="PBody">{{school_name}}{{club_name}}</text:p>
      <text:p text:style-name="PBody">製作日期：{{document_date}}</text:p>
      <text:h text:style-name="PSection" text:outline-level="2">基本資料表</text:h>
      <table:table table:name="基本資料表" table:style-name="TableBase">
        <table:table-column table:style-name="CoWide"/>
        <table:table-column table:style-name="CoWide"/>
        <table:table-row>
          <table:table-cell table:style-name="CellLabel" office:value-type="string">
            <text:p text:style-name="PLabel">會議名稱</text:p>
          </table:table-cell>
          <table:table-cell table:style-name="CellValue" office:value-type="string">
            <text:p text:style-name="PBody">{{meeting_title}}</text:p>
          </table:table-cell>
        </table:table-row>
        <table:table-row>
          <table:table-cell table:style-name="CellLabel" office:value-type="string">
            <text:p text:style-name="PLabel">會議日期</text:p>
          </table:table-cell>
          <table:table-cell table:style-name="CellValue" office:value-type="string">
            <text:p text:style-name="PBody">{{meeting_date}}</text:p>
          </table:table-cell>
        </table:table-row>
        <table:table-row>
          <table:table-cell table:style-name="CellLabel" office:value-type="string">
            <text:p text:style-name="PLabel">會議時間</text:p>
          </table:table-cell>
          <table:table-cell table:style-name="CellValue" office:value-type="string">
            <text:p text:style-name="PBody">{{start_time}} 至 {{end_time}}</text:p>
          </table:table-cell>
        </table:table-row>
        <table:table-row>
          <table:table-cell table:style-name="CellLabel" office:value-type="string">
            <text:p text:style-name="PLabel">會議地點</text:p>
          </table:table-cell>
          <table:table-cell table:style-name="CellValue" office:value-type="string">
            <text:p text:style-name="PBody">{{location}}</text:p>
          </table:table-cell>
        </table:table-row>
        <table:table-row>
          <table:table-cell table:style-name="CellLabel" office:value-type="string">
            <text:p text:style-name="PLabel">主席</text:p>
          </table:table-cell>
          <table:table-cell table:style-name="CellValue" office:value-type="string">
            <text:p text:style-name="PBody">{{chair}}</text:p>
          </table:table-cell>
        </table:table-row>
        <table:table-row>
          <table:table-cell table:style-name="CellLabel" office:value-type="string">
            <text:p text:style-name="PLabel">記錄人員</text:p>
          </table:table-cell>
          <table:table-cell table:style-name="CellValue" office:value-type="string">
            <text:p text:style-name="PBody">{{recorder}}</text:p>
          </table:table-cell>
        </table:table-row>
        <table:table-row>
          <table:table-cell table:style-name="CellLabel" office:value-type="string">
            <text:p text:style-name="PLabel">出席人員</text:p>
          </table:table-cell>
          <table:table-cell table:style-name="CellValue" office:value-type="string">
            <text:p text:style-name="PBody">{{attendees}}</text:p>
          </table:table-cell>
        </table:table-row>
        <table:table-row>
          <table:table-cell table:style-name="CellLabel" office:value-type="string">
            <text:p text:style-name="PLabel">列席人員</text:p>
          </table:table-cell>
          <table:table-cell table:style-name="CellValue" office:value-type="string">
            <text:p text:style-name="PBody">{{observers}}</text:p>
          </table:table-cell>
        </table:table-row>
        <table:table-row>
          <table:table-cell table:style-name="CellLabel" office:value-type="string">
            <text:p text:style-name="PLabel">請假人員</text:p>
          </table:table-cell>
          <table:table-cell table:style-name="CellValue" office:value-type="string">
            <text:p text:style-name="PBody">{{absentees}}</text:p>
          </table:table-cell>
        </table:table-row>
        <table:table-row>
          <table:table-cell table:style-name="CellLabel" office:value-type="string">
            <text:p text:style-name="PLabel">缺席人員</text:p>
          </table:table-cell>
          <table:table-cell table:style-name="CellValue" office:value-type="string">
            <text:p text:style-name="PBody">{{missing_members}}</text:p>
          </table:table-cell>
        </table:table-row>
      </table:table>
      <text:h text:style-name="PSection" text:outline-level="2">壹、會議開始</text:h>
      <text:p text:style-name="PBody">一、上次會議決議追蹤</text:p>
      <text:p text:style-name="PBody">＿＿＿＿＿＿＿＿＿＿</text:p>
      <text:p text:style-name="PBody">二、主席致詞</text:p>
      <text:p text:style-name="PBody">＿＿＿＿＿＿＿＿＿＿</text:p>
      <text:h text:style-name="PSection" text:outline-level="2">貳、報告事項</text:h>
      <text:p text:style-name="PBody">一、報告主題：＿＿＿＿＿＿＿＿＿＿</text:p>
      <text:p text:style-name="PBody">報告人：＿＿＿＿＿＿＿＿＿＿</text:p>
      <text:p text:style-name="PBody">內容：＿＿＿＿＿＿＿＿＿＿</text:p>
      <text:p text:style-name="PBody"/>
      <text:p text:style-name="PBody">二、報告主題：＿＿＿＿＿＿＿＿＿＿</text:p>
      <text:p text:style-name="PBody">報告人：＿＿＿＿＿＿＿＿＿＿</text:p>
      <text:p text:style-name="PBody">內容：＿＿＿＿＿＿＿＿＿＿</text:p>
      <text:h text:style-name="PSection" text:outline-level="2">參、討論事項</text:h>
      <text:p text:style-name="PBody">案由一：＿＿＿＿＿＿＿＿＿＿</text:p>
      <text:p text:style-name="PBody">說明：＿＿＿＿＿＿＿＿＿＿</text:p>
      <text:p text:style-name="PBody">討論：＿＿＿＿＿＿＿＿＿＿</text:p>
      <text:p text:style-name="PBody">決議：＿＿＿＿＿＿＿＿＿＿</text:p>
      <text:p text:style-name="PBody">表決結果：同意＿＿票，不同意＿＿票，棄權＿＿票。</text:p>
      <text:p text:style-name="PBody">負責人：＿＿＿＿＿＿＿＿＿＿</text:p>
      <text:p text:style-name="PBody">執行期限：＿＿＿＿＿＿＿＿＿＿</text:p>
      <text:p text:style-name="PBody">備註：＿＿＿＿＿＿＿＿＿＿</text:p>
      <text:p text:style-name="PBody"/>
      <text:p text:style-name="PBody">案由一：＿＿＿＿＿＿＿＿＿＿</text:p>
      <text:p text:style-name="PBody">說明：＿＿＿＿＿＿＿＿＿＿</text:p>
      <text:p text:style-name="PBody">討論：＿＿＿＿＿＿＿＿＿＿</text:p>
      <text:p text:style-name="PBody">決議：＿＿＿＿＿＿＿＿＿＿</text:p>
      <text:p text:style-name="PBody">表決結果：同意＿＿票，不同意＿＿票，棄權＿＿票。</text:p>
      <text:p text:style-name="PBody">負責人：＿＿＿＿＿＿＿＿＿＿</text:p>
      <text:p text:style-name="PBody">執行期限：＿＿＿＿＿＿＿＿＿＿</text:p>
      <text:p text:style-name="PBody">備註：＿＿＿＿＿＿＿＿＿＿</text:p>
      <text:h text:style-name="PSection" text:outline-level="2">待辦事項</text:h>
      <table:table table:name="待辦事項" table:style-name="TableBase">
        <table:table-column table:style-name="CoNarrow"/>
        <table:table-column table:style-name="CoNarrow"/>
        <table:table-column table:style-name="CoNarrow"/>
        <table:table-column table:style-name="CoNarrow"/>
        <table:table-column table:style-name="CoNarrow"/>
        <table:table-row>
          <table:table-cell table:style-name="CellHeader" office:value-type="string">
            <text:p text:style-name="PTableHeader">項次</text:p>
          </table:table-cell>
          <table:table-cell table:style-name="CellHeader" office:value-type="string">
            <text:p text:style-name="PTableHeader">事項</text:p>
          </table:table-cell>
          <table:table-cell table:style-name="CellHeader" office:value-type="string">
            <text:p text:style-name="PTableHeader">負責人</text:p>
          </table:table-cell>
          <table:table-cell table:style-name="CellHeader" office:value-type="string">
            <text:p text:style-name="PTableHeader">期限</text:p>
          </table:table-cell>
          <table:table-cell table:style-name="CellHeader" office:value-type="string">
            <text:p text:style-name="PTableHeader">備註</text:p>
          </table:table-cell>
        </table:table-row>
        <table:table-row>
          <table:table-cell table:style-name="CellBody" office:value-type="string">
            <text:p text:style-name="PTableBody">1</text:p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>2</text:p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>3</text:p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</table:table>
      <text:h text:style-name="PSection" text:outline-level="2">肆、臨時動議</text:h>
      <text:p text:style-name="PBody">案由一：＿＿＿＿＿＿＿＿＿＿</text:p>
      <text:p text:style-name="PBody">提案人：＿＿＿＿＿＿＿＿＿＿</text:p>
      <text:p text:style-name="PBody">說明：＿＿＿＿＿＿＿＿＿＿</text:p>
      <text:p text:style-name="PBody">討論：＿＿＿＿＿＿＿＿＿＿</text:p>
      <text:p text:style-name="PBody">決議：＿＿＿＿＿＿＿＿＿＿</text:p>
      <text:p text:style-name="PBody">表決結果：同意＿＿票，不同意＿＿票，棄權＿＿票。</text:p>
      <text:p text:style-name="PBody">負責人：＿＿＿＿＿＿＿＿＿＿</text:p>
      <text:p text:style-name="PBody">備註：＿＿＿＿＿＿＿＿＿＿</text:p>
      <text:h text:style-name="PSection" text:outline-level="2">伍、散會</text:h>
      <text:p text:style-name="PBody">散會時間：{{end_time}}</text:p>
      <text:p text:style-name="PBody">下次會議時間：{{next_meeting_time}}</text:p>
      <text:p text:style-name="PBody">備註：{{notes}}</text:p>
      <text:h text:style-name="PSection" text:outline-level="2">簽核欄位</text:h>
      <table:table table:name="簽核欄位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Header" office:value-type="string">
            <text:p text:style-name="PTableHeader">製表人</text:p>
          </table:table-cell>
          <table:table-cell table:style-name="CellHeader" office:value-type="string">
            <text:p text:style-name="PTableHeader">主席</text:p>
          </table:table-cell>
          <table:table-cell table:style-name="CellHeader" office:value-type="string">
            <text:p text:style-name="PTableHeader">社團負責人</text:p>
          </table:table-cell>
          <table:table-cell table:style-name="CellHeader" office:value-type="string">
            <text:p text:style-name="PTableHeader">指導老師</text:p>
          </table:table-cell>
        </table:table-row>
        <table:table-row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FormalCJK" svg:font-family="DFKai-SB, BiauKai, Noto Serif CJK TC, Noto Sans CJK TC, serif"/>
  </office:font-face-decls>
  <office:styles>
    <style:default-style style:family="paragraph">
      <style:text-properties style:font-name="FormalCJK" fo:font-family="DFKai-SB, BiauKai, Noto Serif CJK TC, Noto Sans CJK TC, serif" fo:font-size="12pt"/>
    </style:default-style>
    <style:style style:name="Footer" style:family="paragraph">
      <style:paragraph-properties fo:text-align="center"/>
      <style:text-properties style:font-name="FormalCJK" fo:font-family="DFKai-SB, BiauKai, Noto Serif CJK TC, Noto Sans CJK TC, serif" fo:font-size="10pt"/>
    </style:style>
  </office:styles>
  <office:automatic-styles>
    <style:page-layout style:name="pm1">
      <style:page-layout-properties fo:page-width="21cm" fo:page-height="29.7cm" style:print-orientation="portrait" fo:margin-top="2.2cm" fo:margin-bottom="2.2cm" fo:margin-left="2.2cm" fo:margin-right="2.2cm"/>
    </style:page-layout>
  </office:automatic-styles>
  <office:master-styles>
    <style:master-page style:name="Standard" style:page-layout-name="pm1">
      <style:footer>
        <text:p text:style-name="Footer">第<text:page-number text:select-page="current">1</text:page-number>頁　共<text:page-count>1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