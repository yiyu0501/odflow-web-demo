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number="urn:oasis:names:tc:opendocument:xmlns:datastyle:1.0" xmlns:of="urn:oasis:names:tc:opendocument:xmlns:of:1.2" office:version="1.2">
  <office:scripts/>
  <office:automatic-styles>
    <style:style style:name="Co1" style:family="table-column">
      <style:table-column-properties style:column-width="1.1cm"/>
    </style:style>
    <style:style style:name="Co2" style:family="table-column">
      <style:table-column-properties style:column-width="2.4cm"/>
    </style:style>
    <style:style style:name="Co3" style:family="table-column">
      <style:table-column-properties style:column-width="3.1cm"/>
    </style:style>
    <style:style style:name="Co4" style:family="table-column">
      <style:table-column-properties style:column-width="4.2cm"/>
    </style:style>
    <style:style style:name="Co5" style:family="table-column">
      <style:table-column-properties style:column-width="1.7cm"/>
    </style:style>
    <style:style style:name="Co6" style:family="table-column">
      <style:table-column-properties style:column-width="1.8cm"/>
    </style:style>
    <style:style style:name="Co7" style:family="table-column">
      <style:table-column-properties style:column-width="2.1cm"/>
    </style:style>
    <style:style style:name="Co8" style:family="table-column">
      <style:table-column-properties style:column-width="2.3cm"/>
    </style:style>
    <style:style style:name="Co9" style:family="table-column">
      <style:table-column-properties style:column-width="2.5cm"/>
    </style:style>
    <style:style style:name="Co10" style:family="table-column">
      <style:table-column-properties style:column-width="2.6cm"/>
    </style:style>
    <style:style style:name="Co11" style:family="table-column">
      <style:table-column-properties style:column-width="3.0cm"/>
    </style:style>
    <number:number-style style:name="NNumber">
      <number:number number:min-integer-digits="1" number:decimal-places="0"/>
    </number:number-style>
    <number:number-style style:name="NAmount">
      <number:number number:min-integer-digits="1" number:decimal-places="0" number:grouping="true"/>
    </number:number-style>
    <number:percentage-style style:name="NPercent">
      <number:number number:min-integer-digits="1" number:decimal-places="2"/>
      <number:text>%</number:text>
    </number:percentage-style>
    <number:date-style style:name="NDate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RowDefault" style:family="table-row">
      <style:table-row-properties style:row-height="0.72cm"/>
    </style:style>
    <style:style style:name="RowTitle" style:family="table-row">
      <style:table-row-properties style:row-height="0.95cm"/>
    </style:style>
    <style:style style:name="RowHeader" style:family="table-row">
      <style:table-row-properties style:row-height="0.82cm"/>
    </style:style>
    <style:style style:name="RowSummary" style:family="table-row">
      <style:table-row-properties style:row-height="0.75cm"/>
    </style:style>
    <style:style style:name="PTitle" style:family="paragraph">
      <style:paragraph-properties fo:text-align="center"/>
      <style:text-properties fo:font-family="DFKai-SB, BiauKai, Noto Serif CJK TC, Noto Sans CJK TC, serif" fo:font-size="15pt" fo:font-weight="bold"/>
    </style:style>
    <style:style style:name="PHeader" style:family="paragraph">
      <style:paragraph-properties fo:text-align="center"/>
      <style:text-properties fo:font-family="DFKai-SB, BiauKai, Noto Serif CJK TC, Noto Sans CJK TC, serif" fo:font-size="11pt" fo:font-weight="bold"/>
    </style:style>
    <style:style style:name="PLabel" style:family="paragraph">
      <style:text-properties fo:font-family="DFKai-SB, BiauKai, Noto Serif CJK TC, Noto Sans CJK TC, serif" fo:font-size="12pt" fo:font-weight="bold"/>
    </style:style>
    <style:style style:name="PBody" style:family="paragraph">
      <style:text-properties fo:font-family="DFKai-SB, BiauKai, Noto Serif CJK TC, Noto Sans CJK TC, serif" fo:font-size="11pt"/>
    </style:style>
    <style:style style:name="PSmall" style:family="paragraph">
      <style:text-properties fo:font-family="DFKai-SB, BiauKai, Noto Serif CJK TC, Noto Sans CJK TC, serif" fo:font-size="9pt"/>
    </style:style>
    <style:style style:name="CellTitle" style:family="table-cell">
      <style:table-cell-properties fo:border="0.03cm solid #4b5563" fo:padding="0.16cm" fo:background-color="#f8fafc"/>
    </style:style>
    <style:style style:name="CellLabel" style:family="table-cell">
      <style:table-cell-properties fo:border="0.03cm solid #6b7280" fo:padding="0.12cm" fo:background-color="#eef2ff"/>
    </style:style>
    <style:style style:name="CellValue" style:family="table-cell">
      <style:table-cell-properties fo:border="0.03cm solid #9ca3af" fo:padding="0.12cm"/>
    </style:style>
    <style:style style:name="CellDate" style:family="table-cell" style:data-style-name="NDate">
      <style:table-cell-properties fo:border="0.03cm solid #9ca3af" fo:padding="0.12cm"/>
    </style:style>
    <style:style style:name="CellHeader" style:family="table-cell">
      <style:table-cell-properties fo:border="0.03cm solid #374151" fo:padding="0.1cm" fo:background-color="#dbeafe"/>
    </style:style>
    <style:style style:name="CellBody" style:family="table-cell">
      <style:table-cell-properties fo:border="0.03cm solid #cbd5e1" fo:padding="0.09cm"/>
    </style:style>
    <style:style style:name="CellNumber" style:family="table-cell" style:data-style-name="NNumber">
      <style:table-cell-properties fo:border="0.03cm solid #cbd5e1" fo:padding="0.09cm"/>
    </style:style>
    <style:style style:name="CellMoney" style:family="table-cell" style:data-style-name="NAmount">
      <style:table-cell-properties fo:border="0.03cm solid #cbd5e1" fo:padding="0.09cm"/>
    </style:style>
    <style:style style:name="CellMoneyFormula" style:family="table-cell" style:data-style-name="NAmount">
      <style:table-cell-properties fo:border="0.03cm solid #94a3b8" fo:padding="0.09cm" fo:background-color="#f8fafc"/>
    </style:style>
    <style:style style:name="CellSummaryHeader" style:family="table-cell">
      <style:table-cell-properties fo:border="0.03cm solid #4b5563" fo:padding="0.1cm" fo:background-color="#e5e7eb"/>
    </style:style>
    <style:style style:name="CellSummaryText" style:family="table-cell">
      <style:table-cell-properties fo:border="0.03cm solid #cbd5e1" fo:padding="0.09cm"/>
    </style:style>
    <style:style style:name="CellSummaryMoney" style:family="table-cell" style:data-style-name="NAmount">
      <style:table-cell-properties fo:border="0.03cm solid #cbd5e1" fo:padding="0.09cm"/>
    </style:style>
    <style:style style:name="CellSummaryFormula" style:family="table-cell" style:data-style-name="NAmount">
      <style:table-cell-properties fo:border="0.03cm solid #cbd5e1" fo:padding="0.09cm" fo:background-color="#f8fafc"/>
    </style:style>
    <style:style style:name="CellSummaryPercent" style:family="table-cell" style:data-style-name="NPercent">
      <style:table-cell-properties fo:border="0.03cm solid #cbd5e1" fo:padding="0.09cm" fo:background-color="#f8fafc"/>
    </style:style>
    <style:style style:name="CellBlank" style:family="table-cell">
      <style:table-cell-properties fo:border="none" fo:padding="0.08cm"/>
    </style:style>
  </office:automatic-styles>
  <office:body>
    <office:spreadsheet>
      <table:content-validations>
        <table:content-validation table:name="validation_budget_category" table:allow-empty-cell="true" table:display-list="unsorted" table:condition="of:cell-content-is-in-list(&quot;場地費&quot;;&quot;講師費&quot;;&quot;交通費&quot;;&quot;餐費&quot;;&quot;保險費&quot;;&quot;文宣費&quot;;&quot;印刷費&quot;;&quot;材料費&quot;;&quot;器材費&quot;;&quot;獎品費&quot;;&quot;雜支&quot;;&quot;其他&quot;)">
          <table:error-message table:display="true" table:message-type="stop">
            <text:p text:style-name="PSmall">請從項目類別清單選擇。</text:p>
          </table:error-message>
        </table:content-validation>
        <table:content-validation table:name="validation_budget_funding_source" table:allow-empty-cell="true" table:display-list="unsorted" table:condition="of:cell-content-is-in-list(&quot;學校補助&quot;;&quot;社團會費&quot;;&quot;校外補助&quot;;&quot;自籌&quot;;&quot;其他&quot;)">
          <table:error-message table:display="true" table:message-type="stop">
            <text:p text:style-name="PSmall">請從經費來源清單選擇。</text:p>
          </table:error-message>
        </table:content-validation>
        <table:content-validation table:name="validation_budget_subsidy" table:allow-empty-cell="true" table:display-list="unsorted" table:condition="of:cell-content-is-in-list(&quot;是&quot;;&quot;否&quot;;&quot;待確認&quot;)">
          <table:error-message table:display="true" table:message-type="stop">
            <text:p text:style-name="PSmall">請從是否申請補助清單選擇。</text:p>
          </table:error-message>
        </table:content-validation>
      </table:content-validations>
      <table:table table:name="經費預算表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row table:style-name="RowTitle">
          <table:table-cell table:style-name="CellBlank" office:value-type="string" table:number-columns-spanned="11">
            <text:p text:style-name="PTitle">臺北市立大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Title">
          <table:table-cell table:style-name="CellBlank" office:value-type="string" table:number-columns-spanned="11">
            <text:p text:style-name="PTitle">「活動名稱」經費預算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活動名稱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日期</text:p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主辦社團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活動負責人</text:p>
          </table:table-cell>
          <table:table-cell table:style-name="CellValue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財務負責人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製表日期</text:p>
          </table:table-cell>
          <table:table-cell table:style-name="CellDate" office:value-type="string">
            <text:p text:style-name="PBody"/>
          </table:table-cell>
        </table:table-row>
        <table:table-row table:style-name="RowHeader">
          <table:table-cell table:style-name="CellHeader" office:value-type="string">
            <text:p text:style-name="PHeader">序號</text:p>
          </table:table-cell>
          <table:table-cell table:style-name="CellHeader" office:value-type="string">
            <text:p text:style-name="PHeader">項目類別</text:p>
          </table:table-cell>
          <table:table-cell table:style-name="CellHeader" office:value-type="string">
            <text:p text:style-name="PHeader">項目</text:p>
          </table:table-cell>
          <table:table-cell table:style-name="CellHeader" office:value-type="string">
            <text:p text:style-name="PHeader">說明</text:p>
          </table:table-cell>
          <table:table-cell table:style-name="CellHeader" office:value-type="string">
            <text:p text:style-name="PHeader">數量</text:p>
          </table:table-cell>
          <table:table-cell table:style-name="CellHeader" office:value-type="string">
            <text:p text:style-name="PHeader">單位</text:p>
          </table:table-cell>
          <table:table-cell table:style-name="CellHeader" office:value-type="string">
            <text:p text:style-name="PHeader">單價</text:p>
          </table:table-cell>
          <table:table-cell table:style-name="CellHeader" office:value-type="string">
            <text:p text:style-name="PHeader">金額</text:p>
          </table:table-cell>
          <table:table-cell table:style-name="CellHeader" office:value-type="string">
            <text:p text:style-name="PHeader">經費來源</text:p>
          </table:table-cell>
          <table:table-cell table:style-name="CellHeader" office:value-type="string">
            <text:p text:style-name="PHeader">是否申請補助</text:p>
          </table:table-cell>
          <table:table-cell table:style-name="CellHeader" office:value-type="string">
            <text:p text:style-name="PHeader">備註</text:p>
          </table:table-cell>
        </table:table-row>
        <table:table-row table:style-name="RowDefault">
          <table:table-cell table:style-name="CellNumber" office:value-type="float" office:value="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])*N([.G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])*N([.G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])*N([.G1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1])*N([.G1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2])*N([.G1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3])*N([.G1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4])*N([.G1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5])*N([.G1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6])*N([.G1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7])*N([.G1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8])*N([.G1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9])*N([.G1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0])*N([.G2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1])*N([.G2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2])*N([.G2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3])*N([.G2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4])*N([.G2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5])*N([.G2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6])*N([.G2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7])*N([.G2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8])*N([.G2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29])*N([.G2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0])*N([.G3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1])*N([.G3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2])*N([.G3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3])*N([.G3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4])*N([.G3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5])*N([.G3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2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6])*N([.G3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7])*N([.G3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8])*N([.G3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39])*N([.G3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0])*N([.G4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1])*N([.G4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2])*N([.G4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3])*N([.G4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4])*N([.G4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5])*N([.G4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3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6])*N([.G4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7])*N([.G4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8])*N([.G4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49])*N([.G4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0])*N([.G5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1])*N([.G5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2])*N([.G5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3])*N([.G5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4])*N([.G5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5])*N([.G5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4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6])*N([.G5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7])*N([.G5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8])*N([.G5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59])*N([.G5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0])*N([.G6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1])*N([.G6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2])*N([.G6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3])*N([.G6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4])*N([.G6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5])*N([.G6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5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6])*N([.G6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7])*N([.G6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8])*N([.G6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69])*N([.G6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0])*N([.G7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1])*N([.G7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2])*N([.G7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3])*N([.G7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4])*N([.G7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5])*N([.G7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6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6])*N([.G7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7])*N([.G7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8])*N([.G7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79])*N([.G7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0])*N([.G8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1])*N([.G8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2])*N([.G8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3])*N([.G8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4])*N([.G8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5])*N([.G8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7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6])*N([.G8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7])*N([.G8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8])*N([.G8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89])*N([.G8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0])*N([.G9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1])*N([.G9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2])*N([.G9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3])*N([.G9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4])*N([.G9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5])*N([.G9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8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6])*N([.G9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7])*N([.G9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1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8])*N([.G98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2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99])*N([.G99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3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0])*N([.G100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4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1])*N([.G101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5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2])*N([.G102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6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3])*N([.G103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7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4])*N([.G104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8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5])*N([.G105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99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6])*N([.G106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Number" office:value-type="float" office:value="100">
            <text:p text:style-name="PBody"/>
          </table:table-cell>
          <table:table-cell table:style-name="CellBody" office:value-type="string" table:content-validation-name="validation_budget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Number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N([.E107])*N([.G107])">
            <text:p text:style-name="PBody"/>
          </table:table-cell>
          <table:table-cell table:style-name="CellBody" office:value-type="string" table:content-validation-name="validation_budget_funding_source">
            <text:p text:style-name="PBody"/>
          </table:table-cell>
          <table:table-cell table:style-name="CellBody" office:value-type="string" table:content-validation-name="validation_budget_subsidy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11">
            <text:p text:style-name="PHeader">預算摘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2">
            <text:p text:style-name="PLabel">活動總預算</text:p>
          </table:table-cell>
          <table:covered-table-cell/>
          <table:table-cell table:style-name="CellSummaryFormula" office:value-type="float" office:value="0" table:formula="=SUM([.H8:.H107])">
            <text:p text:style-name="PBody"/>
          </table:table-cell>
          <table:table-cell table:style-name="CellSummaryText" office:value-type="string" table:number-columns-spanned="2">
            <text:p text:style-name="PLabel">申請補助總額</text:p>
          </table:table-cell>
          <table:covered-table-cell/>
          <table:table-cell table:style-name="CellSummaryFormula" office:value-type="float" office:value="0" table:formula="=SUMIF([.J8:.J107];&quot;是&quot;;[.H8:.H107])">
            <text:p text:style-name="PBody"/>
          </table:table-cell>
          <table:table-cell table:style-name="CellSummaryText" office:value-type="string" table:number-columns-spanned="2">
            <text:p text:style-name="PLabel">自籌總額</text:p>
          </table:table-cell>
          <table:covered-table-cell/>
          <table:table-cell table:style-name="CellSummaryFormula" office:value-type="float" office:value="0" table:formula="=SUMIF([.I8:.I107];&quot;社團會費&quot;;[.H8:.H107])+SUMIF([.I8:.I107];&quot;自籌&quot;;[.H8:.H107])">
            <text:p text:style-name="PBody"/>
          </table:table-cell>
        </table:table-row>
        <table:table-row table:style-name="RowSummary">
          <table:table-cell table:style-name="CellSummaryText" office:value-type="string" table:number-columns-spanned="2">
            <text:p text:style-name="PLabel">學校補助預算</text:p>
          </table:table-cell>
          <table:covered-table-cell/>
          <table:table-cell table:style-name="CellSummaryFormula" office:value-type="float" office:value="0" table:formula="=SUMIF([.I8:.I107];&quot;學校補助&quot;;[.H8:.H107])">
            <text:p text:style-name="PBody"/>
          </table:table-cell>
          <table:table-cell table:style-name="CellSummaryText" office:value-type="string" table:number-columns-spanned="2">
            <text:p text:style-name="PLabel">社團會費預算</text:p>
          </table:table-cell>
          <table:covered-table-cell/>
          <table:table-cell table:style-name="CellSummaryFormula" office:value-type="float" office:value="0" table:formula="=SUMIF([.I8:.I107];&quot;社團會費&quot;;[.H8:.H107])">
            <text:p text:style-name="PBody"/>
          </table:table-cell>
          <table:table-cell table:style-name="CellSummaryText" office:value-type="string" table:number-columns-spanned="2">
            <text:p text:style-name="PLabel">校外補助預算</text:p>
          </table:table-cell>
          <table:covered-table-cell/>
          <table:table-cell table:style-name="CellSummaryFormula" office:value-type="float" office:value="0" table:formula="=SUMIF([.I8:.I107];&quot;校外補助&quot;;[.H8:.H107])">
            <text:p text:style-name="PBody"/>
          </table:table-cell>
        </table:table-row>
        <table:table-row table:style-name="RowSummary">
          <table:table-cell table:style-name="CellSummaryText" office:value-type="string" table:number-columns-spanned="2">
            <text:p text:style-name="PLabel">自籌預算</text:p>
          </table:table-cell>
          <table:covered-table-cell/>
          <table:table-cell table:style-name="CellSummaryFormula" office:value-type="float" office:value="0" table:formula="=SUMIF([.I8:.I107];&quot;自籌&quot;;[.H8:.H107])">
            <text:p text:style-name="PBody"/>
          </table:table-cell>
          <table:table-cell table:style-name="CellSummaryText" office:value-type="string" table:number-columns-spanned="2">
            <text:p text:style-name="PLabel">其他經費預算</text:p>
          </table:table-cell>
          <table:covered-table-cell/>
          <table:table-cell table:style-name="CellSummaryFormula" office:value-type="float" office:value="0" table:formula="=SUMIF([.I8:.I107];&quot;其他&quot;;[.H8:.H107])">
            <text:p text:style-name="PBody"/>
          </table:table-cell>
          <table:table-cell table:style-name="CellSummaryText" office:value-type="string" table:number-columns-spanned="2">
            <text:p text:style-name="PLabel">待確認補助項目數</text:p>
          </table:table-cell>
          <table:covered-table-cell/>
          <table:table-cell table:style-name="CellSummaryFormula" office:value-type="float" office:value="0" table:formula="=COUNTIF([.J8:.J107];&quot;待確認&quot;)">
            <text:p text:style-name="PBody"/>
          </table:table-cell>
        </table:table-row>
        <table:table-row table:style-name="RowSummary">
          <table:table-cell table:style-name="CellSummaryText" office:value-type="string" table:number-columns-spanned="2">
            <text:p text:style-name="PLabel">自籌比例</text:p>
          </table:table-cell>
          <table:covered-table-cell/>
          <table:table-cell table:style-name="CellSummaryPercent" office:value-type="float" office:value="0" table:formula="=IF(SUM([.H8:.H107])=0;0;(SUMIF([.I8:.I107];&quot;社團會費&quot;;[.H8:.H107])+SUMIF([.I8:.I107];&quot;自籌&quot;;[.H8:.H107]))/SUM([.H8:.H107]))">
            <text:p text:style-name="PBody"/>
          </table:table-cell>
          <table:table-cell table:style-name="CellSummaryText" office:value-type="string" table:number-columns-spanned="8">
            <text:p text:style-name="PBody">以活動總預算為分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備註</text:p>
          </table:table-cell>
          <table:table-cell table:style-name="CellValue" office:value-type="string" table:number-columns-spanned="10">
            <text:p text:style-name="P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SummaryHeader" office:value-type="string" table:number-columns-spanned="11">
            <text:p text:style-name="PHeader">簽核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Header">
          <table:table-cell table:style-name="CellSummaryHeader" office:value-type="string" table:number-columns-spanned="2">
            <text:p text:style-name="PHeader">製表人</text:p>
          </table:table-cell>
          <table:covered-table-cell/>
          <table:table-cell table:style-name="CellSummaryHeader" office:value-type="string" table:number-columns-spanned="3">
            <text:p text:style-name="PHeader">社團負責人</text:p>
          </table:table-cell>
          <table:covered-table-cell/>
          <table:covered-table-cell/>
          <table:table-cell table:style-name="CellSummaryHeader" office:value-type="string" table:number-columns-spanned="3">
            <text:p text:style-name="PHeader">指導老師</text:p>
          </table:table-cell>
          <table:covered-table-cell/>
          <table:covered-table-cell/>
          <table:table-cell table:style-name="CellSummaryHeader" office:value-type="string" table:number-columns-spanned="3">
            <text:p text:style-name="PHeader">審核單位</text:p>
          </table:table-cell>
          <table:covered-table-cell/>
          <table:covered-table-cell/>
        </table:table-row>
        <table:table-row table:style-name="RowSummary">
          <table:table-cell table:style-name="CellSummaryText" office:value-type="string" table:number-columns-spanned="2">
            <text:p text:style-name="PBody"/>
          </table:table-cell>
          <table:covered-table-cell/>
          <table:table-cell table:style-name="CellSummaryText" office:value-type="string" table:number-columns-spanned="3">
            <text:p text:style-name="PBody"/>
          </table:table-cell>
          <table:covered-table-cell/>
          <table:covered-table-cell/>
          <table:table-cell table:style-name="CellSummaryText" office:value-type="string" table:number-columns-spanned="3">
            <text:p text:style-name="PBody"/>
          </table:table-cell>
          <table:covered-table-cell/>
          <table:covered-table-cell/>
          <table:table-cell table:style-name="CellSummaryText" office:value-type="string" table:number-columns-spanned="3">
            <text:p text:style-name="PBody"/>
          </table:table-cell>
          <table:covered-table-cell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fo:font-family="DFKai-SB, BiauKai, Noto Serif CJK TC, Noto Sans CJK TC, serif" fo:font-size="12pt"/>
    </style:default-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