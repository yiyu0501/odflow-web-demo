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office:version="1.2">
  <office:scripts/>
  <office:automatic-styles>
    <style:style style:name="PTitle" style:family="paragraph">
      <style:paragraph-properties fo:text-align="center" fo:margin-bottom="0.34cm"/>
      <style:text-properties fo:font-family="DFKai-SB, BiauKai, Noto Serif CJK TC, Noto Sans CJK TC, serif" fo:font-size="15.5pt" fo:font-weight="bold"/>
    </style:style>
    <style:style style:name="PSection" style:family="paragraph">
      <style:paragraph-properties fo:margin-top="0.18cm" fo:margin-bottom="0.07cm"/>
      <style:text-properties fo:font-family="DFKai-SB, BiauKai, Noto Serif CJK TC, Noto Sans CJK TC, serif" fo:font-size="12.5pt" fo:font-weight="bold"/>
    </style:style>
    <style:style style:name="PBody" style:family="paragraph">
      <style:paragraph-properties fo:margin-bottom="0.12cm" fo:line-height="138%"/>
      <style:text-properties fo:font-family="DFKai-SB, BiauKai, Noto Serif CJK TC, Noto Sans CJK TC, serif" fo:font-size="11.5pt"/>
    </style:style>
    <style:style style:name="PTableLabel" style:family="paragraph">
      <style:text-properties fo:font-family="DFKai-SB, BiauKai, Noto Serif CJK TC, Noto Sans CJK TC, serif" fo:font-size="10.5pt" fo:font-weight="bold"/>
    </style:style>
    <style:style style:name="PTableValue" style:family="paragraph">
      <style:paragraph-properties fo:line-height="136%"/>
      <style:text-properties fo:font-family="DFKai-SB, BiauKai, Noto Serif CJK TC, Noto Sans CJK TC, serif" fo:font-size="10.5pt"/>
    </style:style>
    <style:style style:name="TableBase" style:family="table">
      <style:table-properties table:border-model="collapsing" style:width="17.4cm" table:align="margins"/>
    </style:style>
    <style:style style:name="CoFull" style:family="table-column">
      <style:table-column-properties style:column-width="17.4cm"/>
    </style:style>
    <style:style style:name="CoS1" style:family="table-column">
      <style:table-column-properties style:column-width="2.3cm"/>
    </style:style>
    <style:style style:name="CoS2" style:family="table-column">
      <style:table-column-properties style:column-width="5.2cm"/>
    </style:style>
    <style:style style:name="CoS3" style:family="table-column">
      <style:table-column-properties style:column-width="2.4cm"/>
    </style:style>
    <style:style style:name="CoS4" style:family="table-column">
      <style:table-column-properties style:column-width="2.4cm"/>
    </style:style>
    <style:style style:name="CoS5" style:family="table-column">
      <style:table-column-properties style:column-width="2.4cm"/>
    </style:style>
    <style:style style:name="CoS6" style:family="table-column">
      <style:table-column-properties style:column-width="2.7cm"/>
    </style:style>
    <style:style style:name="CellHeader" style:family="table-cell">
      <style:table-cell-properties fo:border="0.02cm solid #6b7280" fo:padding="0.1cm" fo:background-color="#f3f4f6"/>
    </style:style>
    <style:style style:name="CellBody" style:family="table-cell">
      <style:table-cell-properties fo:border="0.02cm solid #6b7280" fo:padding="0.1cm"/>
    </style:style>
  </office:automatic-styles>
  <office:body>
    <office:text>
      <text:h text:style-name="PTitle" text:outline-level="1">{{school_name}}「{{activity_name}}」活動企劃書</text:h>
      <text:p text:style-name="PSection">1、活動主題</text:p>
      <text:p text:style-name="PBody">{{activity_theme}}</text:p>
      <text:p text:style-name="PSection">2、活動宗旨</text:p>
      <text:p text:style-name="PBody">{{purpose}}</text:p>
      <text:p text:style-name="PSection">3、預期效益</text:p>
      <text:p text:style-name="PBody">{{expected_benefits}}</text:p>
      <text:p text:style-name="PSection">4、指導單位</text:p>
      <text:p text:style-name="PBody">{{advisor_unit}}</text:p>
      <text:p text:style-name="PSection">5、主辦單位</text:p>
      <text:p text:style-name="PBody">{{organizer}}</text:p>
      <text:p text:style-name="PSection">6、協辦單位</text:p>
      <text:p text:style-name="PBody">{{co_organizer}}</text:p>
      <text:p text:style-name="PSection">7、活動對象</text:p>
      <text:p text:style-name="PBody">{{target_audience}}</text:p>
      <text:p text:style-name="PSection">8、活動內容</text:p>
      <text:p text:style-name="PBody">{{activity_content}}</text:p>
      <text:p text:style-name="PSection">9、活動地點</text:p>
      <text:p text:style-name="PBody">{{activity_location}}</text:p>
      <text:p text:style-name="PSection">10、活動時間流程表</text:p>
      <table:table table:name="流程表" table:style-name="TableBase">
        <table:table-column table:style-name="CoS1"/>
        <table:table-column table:style-name="CoS2"/>
        <table:table-column table:style-name="CoS3"/>
        <table:table-column table:style-name="CoS4"/>
        <table:table-row>
          <table:table-cell table:style-name="CellHeader" office:value-type="string">
            <text:p text:style-name="PTableLabel">時間</text:p>
          </table:table-cell>
          <table:table-cell table:style-name="CellHeader" office:value-type="string">
            <text:p text:style-name="PTableLabel">內容</text:p>
          </table:table-cell>
          <table:table-cell table:style-name="CellHeader" office:value-type="string">
            <text:p text:style-name="PTableLabel">負責人</text:p>
          </table:table-cell>
          <table:table-cell table:style-name="CellHeader" office:value-type="string">
            <text:p text:style-name="PTableLabel">備註</text:p>
          </table:table-cell>
        </table:table-row>
        <table:table-row>
          <table:table-cell table:number-columns-spanned="4" table:style-name="CellBody" office:value-type="string">
            <text:p text:style-name="PTableValue">{{schedule_table}}</text:p>
          </table:table-cell>
          <table:covered-table-cell/>
          <table:covered-table-cell/>
          <table:covered-table-cell/>
        </table:table-row>
      </table:table>
      <text:p text:style-name="PSection">11、聯絡方式</text:p>
      <table:table table:name="聯絡方式" table:style-name="TableBase">
        <table:table-column table:style-name="CoS1"/>
        <table:table-column table:style-name="CoS3"/>
        <table:table-column table:style-name="CoS4"/>
        <table:table-column table:style-name="CoS6"/>
        <table:table-row>
          <table:table-cell table:style-name="CellHeader" office:value-type="string">
            <text:p text:style-name="PTableLabel">職務</text:p>
          </table:table-cell>
          <table:table-cell table:style-name="CellHeader" office:value-type="string">
            <text:p text:style-name="PTableLabel">姓名</text:p>
          </table:table-cell>
          <table:table-cell table:style-name="CellHeader" office:value-type="string">
            <text:p text:style-name="PTableLabel">電話</text:p>
          </table:table-cell>
          <table:table-cell table:style-name="CellHeader" office:value-type="string">
            <text:p text:style-name="PTableLabel">Email</text:p>
          </table:table-cell>
        </table:table-row>
        <table:table-row>
          <table:table-cell table:number-columns-spanned="4" table:style-name="CellBody" office:value-type="string">
            <text:p text:style-name="PTableValue">{{contact_table}}</text:p>
          </table:table-cell>
          <table:covered-table-cell/>
          <table:covered-table-cell/>
          <table:covered-table-cell/>
        </table:table-row>
      </table:table>
      <text:p text:style-name="PSection">12、宣傳方式</text:p>
      <text:p text:style-name="PBody">{{promotion_plan}}</text:p>
      <text:p text:style-name="PSection">13、工作人員、內容分配與預定進度</text:p>
      <table:table table:name="工作分配" table:style-name="TableBase">
        <table:table-column table:style-name="CoS2"/>
        <table:table-column table:style-name="CoS3"/>
        <table:table-column table:style-name="CoS5"/>
        <table:table-column table:style-name="CoS6"/>
        <table:table-row>
          <table:table-cell table:style-name="CellHeader" office:value-type="string">
            <text:p text:style-name="PTableLabel">工作項目</text:p>
          </table:table-cell>
          <table:table-cell table:style-name="CellHeader" office:value-type="string">
            <text:p text:style-name="PTableLabel">負責人</text:p>
          </table:table-cell>
          <table:table-cell table:style-name="CellHeader" office:value-type="string">
            <text:p text:style-name="PTableLabel">預定進度</text:p>
          </table:table-cell>
          <table:table-cell table:style-name="CellHeader" office:value-type="string">
            <text:p text:style-name="PTableLabel">備註</text:p>
          </table:table-cell>
        </table:table-row>
        <table:table-row>
          <table:table-cell table:number-columns-spanned="4" table:style-name="CellBody" office:value-type="string">
            <text:p text:style-name="PTableValue">{{preparation_table}}</text:p>
          </table:table-cell>
          <table:covered-table-cell/>
          <table:covered-table-cell/>
          <table:covered-table-cell/>
        </table:table-row>
      </table:table>
      <text:p text:style-name="PSection">14、活動預算</text:p>
      <table:table table:name="活動預算" table:style-name="TableBase">
        <table:table-column table:style-name="CoS1"/>
        <table:table-column table:style-name="CoS2"/>
        <table:table-column table:style-name="CoS3"/>
        <table:table-column table:style-name="CoS3"/>
        <table:table-column table:style-name="CoS3"/>
        <table:table-column table:style-name="CoS3"/>
        <table:table-column table:style-name="CoS3"/>
        <table:table-row>
          <table:table-cell table:style-name="CellHeader" office:value-type="string">
            <text:p text:style-name="PTableLabel">項目</text:p>
          </table:table-cell>
          <table:table-cell table:style-name="CellHeader" office:value-type="string">
            <text:p text:style-name="PTableLabel">說明</text:p>
          </table:table-cell>
          <table:table-cell table:style-name="CellHeader" office:value-type="string">
            <text:p text:style-name="PTableLabel">數量 / 單位</text:p>
          </table:table-cell>
          <table:table-cell table:style-name="CellHeader" office:value-type="string">
            <text:p text:style-name="PTableLabel">單價</text:p>
          </table:table-cell>
          <table:table-cell table:style-name="CellHeader" office:value-type="string">
            <text:p text:style-name="PTableLabel">金額</text:p>
          </table:table-cell>
          <table:table-cell table:style-name="CellHeader" office:value-type="string">
            <text:p text:style-name="PTableLabel">預算來源</text:p>
          </table:table-cell>
          <table:table-cell table:style-name="CellHeader" office:value-type="string">
            <text:p text:style-name="PTableLabel">備註</text:p>
          </table:table-cell>
        </table:table-row>
        <table:table-row>
          <table:table-cell table:number-columns-spanned="7" table:style-name="CellBody" office:value-type="string">
            <text:p text:style-name="PTableValue">{{budget_table}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Section">15、所需設備清單</text:p>
      <text:p text:style-name="PBody">{{equipment_list}}</text:p>
      <text:p text:style-name="PSection">16、需學校協助事項</text:p>
      <text:p text:style-name="PBody">{{school_support}}</text:p>
      <text:p text:style-name="PSection">17、附件</text:p>
      <text:p text:style-name="PBody">{{attachments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office:version="1.2">
  <office:font-face-decls>
    <style:font-face style:name="FormalCJK" svg:font-family="DFKai-SB, BiauKai, Noto Serif CJK TC, Noto Sans CJK TC, serif"/>
  </office:font-face-decls>
  <office:styles>
    <style:default-style style:family="paragraph">
      <style:text-properties style:font-name="FormalCJK" fo:font-family="DFKai-SB, BiauKai, Noto Serif CJK TC, Noto Sans CJK TC, serif" fo:font-size="12pt"/>
    </style:default-style>
  </office:styles>
  <office:automatic-styles>
    <style:page-layout style:name="pm1">
      <style:page-layout-properties fo:page-width="21cm" fo:page-height="29.7cm" style:print-orientation="portrait" fo:margin-top="1.7cm" fo:margin-bottom="1.7cm" fo:margin-left="1.7cm" fo:margin-right="1.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/>
</office:document-meta>
</file>